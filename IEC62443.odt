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表格1" style:family="table">
      <style:table-properties style:width="15.972cm" table:align="left"/>
    </style:style>
    <style:style style:name="表格1.A" style:family="table-column">
      <style:table-column-properties style:column-width="1.055cm"/>
    </style:style>
    <style:style style:name="表格1.B" style:family="table-column">
      <style:table-column-properties style:column-width="3.893cm"/>
    </style:style>
    <style:style style:name="表格1.C" style:family="table-column">
      <style:table-column-properties style:column-width="11.024cm"/>
    </style:style>
    <style:style style:name="表格1.A1" style:family="table-cell">
      <style:table-cell-properties style:vertical-align="middle" fo:padding="0.049cm" fo:border="none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74cm"/>
    </style:style>
    <style:style style:name="表格2.B" style:family="table-column">
      <style:table-column-properties style:column-width="7.627cm"/>
    </style:style>
    <style:style style:name="表格2.C" style:family="table-column">
      <style:table-column-properties style:column-width="7.299cm"/>
    </style:style>
    <style:style style:name="表格2.A1" style:family="table-cell">
      <style:table-cell-properties style:vertical-align="middle" fo:padding="0.049cm" fo:border="none"/>
    </style:style>
    <style:style style:name="P1" style:family="paragraph" style:parent-style-name="Horizontal_20_Line">
      <style:text-properties officeooo:paragraph-rsid="0020e511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7"/>
    <style:style style:name="P37" style:family="paragraph" style:parent-style-name="Text_20_body" style:list-style-name="L17">
      <style:paragraph-properties fo:margin-top="0cm" fo:margin-bottom="0cm" style:contextual-spacing="false"/>
    </style:style>
    <style:style style:name="P38" style:family="paragraph" style:parent-style-name="Text_20_body" style:list-style-name="L18">
      <style:paragraph-properties fo:margin-top="0cm" fo:margin-bottom="0cm" style:contextual-spacing="false"/>
    </style:style>
    <style:style style:name="P39" style:family="paragraph" style:parent-style-name="Text_20_body" style:list-style-name="L18"/>
    <style:style style:name="P40" style:family="paragraph" style:parent-style-name="Text_20_body" style:list-style-name="L19">
      <style:paragraph-properties fo:margin-top="0cm" fo:margin-bottom="0cm" style:contextual-spacing="false"/>
    </style:style>
    <style:style style:name="P41" style:family="paragraph" style:parent-style-name="Text_20_body" style:list-style-name="L19"/>
    <style:style style:name="P42" style:family="paragraph" style:parent-style-name="Text_20_body" style:list-style-name="L20">
      <style:paragraph-properties fo:margin-top="0cm" fo:margin-bottom="0cm" style:contextual-spacing="false"/>
    </style:style>
    <style:style style:name="P43" style:family="paragraph" style:parent-style-name="Text_20_body" style:list-style-name="L20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EC 62443-4-2 是工业自动化及控制系统（IACS）系列标准中的技术核心，专门定义<text:span text:style-name="Strong_20_Emphasis">单一组件（Components）</text:span>应具备的具体资安技术要求。</text:p>
      <text:p text:style-name="Standard">其与 IEC 62443-4-1 的主要区别在于：4-1 规范“开发流程”（怎么做），而 4-2 规范“产品功能”（做什么）。</text:p>
      <text:p text:style-name="Horizontal_20_Line"/>
      <text:h text:style-name="Heading_20_2" text:outline-level="2">1. 涵盖的四种组件类型 </text:h>
      <text:p text:style-name="Text_20_body">该标准根据组件在工业控制环境中的功能，将其分为四大类并分别定义需求：</text:p>
      <text:list xml:id="list4270694221" text:style-name="L1">
        <text:list-item>
          <text:p text:style-name="P4"><text:span text:style-name="Strong_20_Emphasis">嵌入式设备 (Embedded Devices, ED)</text:span>：如 PLC、RTU、DCS 控制器及传感器。</text:p>
        </text:list-item>
        <text:list-item>
          <text:p text:style-name="P4"><text:span text:style-name="Strong_20_Emphasis">网络设备 (Network Devices, ND)</text:span>：如工业交换机、路由器、防火墙。</text:p>
        </text:list-item>
        <text:list-item>
          <text:p text:style-name="P4"><text:span text:style-name="Strong_20_Emphasis">主机设备 (Host Devices, HD)</text:span>：如工程站、HMI、数据服务器。</text:p>
        </text:list-item>
        <text:list-item>
          <text:p text:style-name="P5"><text:span text:style-name="Strong_20_Emphasis">软件应用程序 (Software Applications, SA)</text:span>：如 SCADA 软件、杀毒软件或资产管理工具。</text:p>
        </text:list-item>
      </text:list>
      <text:p text:style-name="Horizontal_20_Line"/>
      <text:h text:style-name="Heading_20_2" text:outline-level="2">2. 技术要求架构 </text:h>
      <text:p text:style-name="P3">4-2 标准将超过 140 项具体需求归纳在 <text:span text:style-name="Strong_20_Emphasis">7 个基础需求（Foundational Requirements, FR）</text:span>之下：</text:p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>
            <table:table-cell table:style-name="表格1.A1" office:value-type="string">
              <text:p text:style-name="Table_20_Heading">FR</text:p>
            </table:table-cell>
            <table:table-cell table:style-name="表格1.A1" office:value-type="string">
              <text:p text:style-name="Table_20_Heading">名称</text:p>
            </table:table-cell>
            <table:table-cell table:style-name="表格1.A1" office:value-type="string">
              <text:p text:style-name="Table_20_Heading">核心说明</text:p>
            </table:table-cell>
          </table:table-row>
        </table:table-header-rows>
        <table:table-row>
          <table:table-cell table:style-name="表格1.A1" office:value-type="string">
            <text:p text:style-name="Table_20_Contents">FR 1</text:p>
          </table:table-cell>
          <table:table-cell table:style-name="表格1.A1" office:value-type="string">
            <text:p text:style-name="Table_20_Contents">识别与验证控制 (IAC)</text:p>
          </table:table-cell>
          <table:table-cell table:style-name="表格1.A1" office:value-type="string">
            <text:p text:style-name="Table_20_Contents">确保所有用户、软件或设备在访问前都经过唯一身份验证。</text:p>
          </table:table-cell>
        </table:table-row>
        <table:table-row>
          <table:table-cell table:style-name="表格1.A1" office:value-type="string">
            <text:p text:style-name="Table_20_Contents">FR 2</text:p>
          </table:table-cell>
          <table:table-cell table:style-name="表格1.A1" office:value-type="string">
            <text:p text:style-name="Table_20_Contents">使用控制 (UC)</text:p>
          </table:table-cell>
          <table:table-cell table:style-name="表格1.A1" office:value-type="string">
            <text:p text:style-name="Table_20_Contents">执行权限管控与记录，遵循“最小特权”原则。</text:p>
          </table:table-cell>
        </table:table-row>
        <table:table-row>
          <table:table-cell table:style-name="表格1.A1" office:value-type="string">
            <text:p text:style-name="Table_20_Contents">FR 3</text:p>
          </table:table-cell>
          <table:table-cell table:style-name="表格1.A1" office:value-type="string">
            <text:p text:style-name="Table_20_Contents">系统完整性 (SI)</text:p>
          </table:table-cell>
          <table:table-cell table:style-name="表格1.A1" office:value-type="string">
            <text:p text:style-name="Table_20_Contents">保护组件不被未经授权地篡改，包含安全开机、固件完整性验证。</text:p>
          </table:table-cell>
        </table:table-row>
        <table:table-row>
          <table:table-cell table:style-name="表格1.A1" office:value-type="string">
            <text:p text:style-name="Table_20_Contents">FR 4</text:p>
          </table:table-cell>
          <table:table-cell table:style-name="表格1.A1" office:value-type="string">
            <text:p text:style-name="Table_20_Contents">数据机密性 (DC)</text:p>
          </table:table-cell>
          <table:table-cell table:style-name="表格1.A1" office:value-type="string">
            <text:p text:style-name="Table_20_Contents">通过加密保护通讯与存储中的敏感信息。</text:p>
          </table:table-cell>
        </table:table-row>
        <table:table-row>
          <table:table-cell table:style-name="表格1.A1" office:value-type="string">
            <text:p text:style-name="Table_20_Contents">FR 5</text:p>
          </table:table-cell>
          <table:table-cell table:style-name="表格1.A1" office:value-type="string">
            <text:p text:style-name="Table_20_Contents">限制数据流 (RDF)</text:p>
          </table:table-cell>
          <table:table-cell table:style-name="表格1.A1" office:value-type="string">
            <text:p text:style-name="Table_20_Contents">控制通讯路径，如 VLAN 隔离或白名单过滤。</text:p>
          </table:table-cell>
        </table:table-row>
        <table:table-row>
          <table:table-cell table:style-name="表格1.A1" office:value-type="string">
            <text:p text:style-name="Table_20_Contents">FR 6</text:p>
          </table:table-cell>
          <table:table-cell table:style-name="表格1.A1" office:value-type="string">
            <text:p text:style-name="Table_20_Contents">事件及时响应 (TRE)</text:p>
          </table:table-cell>
          <table:table-cell table:style-name="表格1.A1" office:value-type="string">
            <text:p text:style-name="Table_20_Contents">提供完整的审计日志与监控警报功能。</text:p>
          </table:table-cell>
        </table:table-row>
        <table:table-row>
          <table:table-cell table:style-name="表格1.A1" office:value-type="string">
            <text:p text:style-name="Table_20_Contents">FR 7</text:p>
          </table:table-cell>
          <table:table-cell table:style-name="表格1.A1" office:value-type="string">
            <text:p text:style-name="Table_20_Contents">资源可用性 (RA)</text:p>
          </table:table-cell>
          <table:table-cell table:style-name="表格1.A1" office:value-type="string">
            <text:p text:style-name="Table_20_Contents">防御阻断服务攻击（DoS），确保攻击发生时核心功能仍能运作。</text:p>
          </table:table-cell>
        </table:table-row>
      </table:table>
      <text:p text:style-name="Horizontal_20_Line"/>
      <text:h text:style-name="Heading_20_2" text:outline-level="2">3. 安全等级 (Security Level, SL) </text:h>
      <text:p text:style-name="Text_20_body">标准定义了 <text:span text:style-name="Strong_20_Emphasis">4 个能力等级（SL-C）</text:span>，随着等级提升，技术要求会变得更严格：</text:p>
      <text:list xml:id="list3925149933" text:style-name="L2">
        <text:list-item>
          <text:p text:style-name="P6"><text:span text:style-name="Strong_20_Emphasis">SL 1</text:span>：防护无意或偶然的错误。</text:p>
        </text:list-item>
        <text:list-item>
          <text:p text:style-name="P6"><text:span text:style-name="Strong_20_Emphasis">SL 2</text:span>：防护资源与动机较低的简单恶意攻击。</text:p>
        </text:list-item>
        <text:list-item>
          <text:p text:style-name="P6"><text:span text:style-name="Strong_20_Emphasis">SL 3</text:span>：防护具备工控专业知识与中等资源的复杂攻击。</text:p>
        </text:list-item>
        <text:list-item>
          <text:p text:style-name="P7"><text:span text:style-name="Strong_20_Emphasis">SL 4</text:span>：防护具备国家级资源、高动机的进阶持续性威胁（APT），通常要求具备硬件级别的保护（如安全 IC）。</text:p>
        </text:list-item>
      </text:list>
      <text:p text:style-name="Horizontal_20_Line"/>
      <text:h text:style-name="Heading_20_2" text:outline-level="2">4. 产品认证 </text:h>
      <text:p text:style-name="Text_20_body">产品若要取得认证，通常需同时符合：</text:p>
      <text:list xml:id="list661461919" text:style-name="L3">
        <text:list-item>
          <text:p text:style-name="P8"><text:soft-page-break/>4-1 的安全开发流程</text:p>
        </text:list-item>
        <text:list-item>
          <text:p text:style-name="P9">4-2 的技术功能要求</text:p>
        </text:list-item>
      </text:list>
      <text:p text:style-name="Text_20_body">目前主流的认证框架包括：</text:p>
      <text:list xml:id="list2503114838" text:style-name="L4">
        <text:list-item>
          <text:p text:style-name="P10"><text:span text:style-name="Strong_20_Emphasis">IECEE CB 架构</text:span></text:p>
        </text:list-item>
        <text:list-item>
          <text:p text:style-name="P11"><text:span text:style-name="Strong_20_Emphasis">ISASecure CSA</text:span>（原 EDSA）认证</text:p>
        </text:list-item>
      </text:list>
      <text:p text:style-name="Horizontal_20_Line"/>
      <text:h text:style-name="Heading_20_2" text:outline-level="2">针对 PLC / 工业交换器等产品的 SL 2 / SL 3 技术挑战 </text:h>
      <text:p text:style-name="Text_20_body">针对不同类型的产品（如 PLC 或工业交换机）要达到 SL 2 或 SL 3，技术挑战会从“软件功能”提升到“硬件安全”与“密钥管理”。</text:p>
      <text:h text:style-name="Heading_20_3" text:outline-level="3">1. 识别与访问控制 (FR 1 &amp; FR 2) </text:h>
      <text:list xml:id="list3713465486" text:style-name="L5">
        <text:list-item>
          <text:p text:style-name="P13"><text:span text:style-name="Strong_20_Emphasis">SL 2 挑战</text:span>​</text:p>
          <text:list>
            <text:list-item>
              <text:p text:style-name="P13">必须支持基于角色的访问控制（RBAC）。</text:p>
            </text:list-item>
            <text:list-item>
              <text:p text:style-name="P13">设备不能只有一组默认密码，需能区分管理员、操作员与检修员，且密码强度需符合规范。</text:p>
            </text:list-item>
          </text:list>
        </text:list-item>
        <text:list-item>
          <text:p text:style-name="P13"><text:span text:style-name="Strong_20_Emphasis">SL 3 挑战</text:span>​</text:p>
          <text:list>
            <text:list-item>
              <text:p text:style-name="P13">引入多因素验证（MFA）或数字证书（X.509）。</text:p>
            </text:list-item>
            <text:list-item>
              <text:p text:style-name="P12">对于 PLC 而言，远程登录必须经过更严谨的身份挑战（Challenge-Response），且需具备防止暴力破解的锁定机制。</text:p>
            </text:list-item>
          </text:list>
        </text:list-item>
      </text:list>
      <text:h text:style-name="Heading_20_3" text:outline-level="3">2. 系统完整性与安全启动 (FR 3) </text:h>
      <text:p text:style-name="Quotations">这是达到 SL 3 的最大硬件门槛。</text:p>
      <text:list xml:id="list1305079569" text:style-name="L6">
        <text:list-item>
          <text:p text:style-name="P15"><text:span text:style-name="Strong_20_Emphasis">SL 2 挑战</text:span>​</text:p>
          <text:list>
            <text:list-item>
              <text:p text:style-name="P15">固件更新必须经过数字签名（Digital Signature）验证，防止恶意固件植入。</text:p>
            </text:list-item>
          </text:list>
        </text:list-item>
        <text:list-item>
          <text:p text:style-name="P15"><text:span text:style-name="Strong_20_Emphasis">SL 3 挑战</text:span>​</text:p>
          <text:list>
            <text:list-item>
              <text:p text:style-name="P15">必须具备 <text:span text:style-name="Strong_20_Emphasis">Root of Trust (RoT)</text:span>。</text:p>
            </text:list-item>
            <text:list-item>
              <text:p text:style-name="P14">通常需要硬件加密芯片（如 TPM 2.0 或 Secure Element），确保设备从启动的第一个指令到加载操作系统都是受信任的（Secure Boot），防止 Bootloader 被窜改。</text:p>
            </text:list-item>
          </text:list>
        </text:list-item>
      </text:list>
      <text:h text:style-name="Heading_20_3" text:outline-level="3">3. 数据机密性与通讯安全 (FR 4 &amp; FR 5) </text:h>
      <text:list xml:id="list276987088" text:style-name="L7">
        <text:list-item>
          <text:p text:style-name="P17"><text:span text:style-name="Strong_20_Emphasis">SL 2 挑战</text:span>​</text:p>
          <text:list>
            <text:list-item>
              <text:p text:style-name="P17">所有的管理接口（如网页界面、SSH）必须加密。</text:p>
            </text:list-item>
          </text:list>
        </text:list-item>
        <text:list-item>
          <text:p text:style-name="P17"><text:span text:style-name="Strong_20_Emphasis">SL 3 挑战</text:span>​</text:p>
          <text:list>
            <text:list-item>
              <text:p text:style-name="P17">控制流量（Control Plane）的加密。</text:p>
            </text:list-item>
            <text:list-item>
              <text:p text:style-name="P17">例如，PLC 与 HMI 之间的通讯（如 OPC UA 或特定的工业协议）必须全程加密且具备防重放（Anti-replay）机制。</text:p>
            </text:list-item>
            <text:list-item>
              <text:p text:style-name="P16">这对处理能力较弱的嵌入式设备会造成显著的运算负担（性能冲击）。</text:p>
            </text:list-item>
          </text:list>
        </text:list-item>
      </text:list>
      <text:h text:style-name="Heading_20_3" text:outline-level="3"><text:soft-page-break/>4. 资源可用性与抗攻击能力 (FR 7) </text:h>
      <text:list xml:id="list2995369286" text:style-name="L8">
        <text:list-item>
          <text:p text:style-name="P19"><text:span text:style-name="Strong_20_Emphasis">SL 2 挑战</text:span>​</text:p>
          <text:list>
            <text:list-item>
              <text:p text:style-name="P19">具备基本的流量过滤，能抵抗简单的网络风暴。</text:p>
            </text:list-item>
          </text:list>
        </text:list-item>
        <text:list-item>
          <text:p text:style-name="P19"><text:span text:style-name="Strong_20_Emphasis">SL 3 挑战</text:span>​</text:p>
          <text:list>
            <text:list-item>
              <text:p text:style-name="P19">必须能防御拒绝服务攻击（DoS）。</text:p>
            </text:list-item>
            <text:list-item>
              <text:p text:style-name="P18">设备需能在遭受高负载攻击时，优先保证“核心控制逻辑”不中断（如 PLC 仍能执行逻辑扫描，即便网络接口已瘫痪）。</text:p>
            </text:list-item>
          </text:list>
        </text:list-item>
      </text:list>
      <text:h text:style-name="Heading_20_3" text:outline-level="3">5. 常见的实施难点 </text:h>
      <text:list xml:id="list4127618660" text:style-name="L9">
        <text:list-item>
          <text:p text:style-name="P21"><text:span text:style-name="Strong_20_Emphasis">密钥管理 (Key Management)</text:span>​</text:p>
          <text:list>
            <text:list-item>
              <text:p text:style-name="P21">如何安全地将证书注入到成千上万台 PLC 中？</text:p>
            </text:list-item>
            <text:list-item>
              <text:p text:style-name="P21">如何处理证书过期更换？</text:p>
            </text:list-item>
          </text:list>
        </text:list-item>
        <text:list-item>
          <text:p text:style-name="P21"><text:span text:style-name="Strong_20_Emphasis">性能瓶颈</text:span>​</text:p>
          <text:list>
            <text:list-item>
              <text:p text:style-name="P21">加密通讯会增加延迟，这对于要求“微秒级”反应的工业控制系统是巨大的挑战。</text:p>
            </text:list-item>
          </text:list>
        </text:list-item>
        <text:list-item>
          <text:p text:style-name="P21"><text:span text:style-name="Strong_20_Emphasis">旧版兼容性</text:span>​</text:p>
          <text:list>
            <text:list-item>
              <text:p text:style-name="P20">许多工业协议（如 Modbus TCP）原生不支持加密，若要符合 SL 3，往往需要增加硬件防火墙或更换新一代支持安全协议的硬件。</text:p>
            </text:list-item>
          </text:list>
        </text:list-item>
      </text:list>
      <text:p text:style-name="Horizontal_20_Line"/>
      <text:h text:style-name="Heading_20_2" text:outline-level="2">总结建议 </text:h>
      <text:list xml:id="list3807593548" text:style-name="L10">
        <text:list-item>
          <text:p text:style-name="P23"><text:span text:style-name="Strong_20_Emphasis">目标 SL 2</text:span>：重点在于强化密码与固件签名；</text:p>
        </text:list-item>
        <text:list-item>
          <text:p text:style-name="P22"><text:span text:style-name="Strong_20_Emphasis">目标 SL 3</text:span>：则需在硬件设计阶段就纳入安全芯片（TPM），并优化通讯加密性能。</text:p>
        </text:list-item>
      </text:list>
      <text:p text:style-name="P1"/>
      <text:p text:style-name="Standard">作为硬体开发商的软件/固件研发人员，在面对 <text:span text:style-name="Strong_20_Emphasis">IEC 62443-4-2</text:span>（产品技术要求）和 <text:span text:style-name="Strong_20_Emphasis">4-1</text:span>（安全开发生命周期）时，你的角色至关重要。这不仅是写代码，更是要构建一套<text:span text:style-name="Strong_20_Emphasis">可审计的安全体系</text:span>。</text:p>
      <text:p text:style-name="Standard">以下是根据你的需求，将之前的核心内容转化为简体中文，并进一步细化研发人员在各个阶段的具体任务、所需填写的资料以及系统组件的改造重点：</text:p>
      <text:p text:style-name="Horizontal_20_Line"/>
      <text:p text:style-name="P3">一、 软件研发人员在各阶段的任务与产出（基于 4-1 流程）</text:p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Table_20_Heading">开发阶段</text:p>
          </table:table-cell>
          <table:table-cell table:style-name="表格2.A1" office:value-type="string">
            <text:p text:style-name="Table_20_Heading">研发人员核心任务</text:p>
          </table:table-cell>
          <table:table-cell table:style-name="表格2.A1" office:value-type="string">
            <text:p text:style-name="Table_20_Heading">关键产出文档 (审计必备)</text:p>
          </table:table-cell>
        </table:table-row>
        <table:table-row>
          <table:table-cell table:style-name="表格2.A1" office:value-type="string">
            <text:p text:style-name="Table_20_Contents"><text:span text:style-name="Strong_20_Emphasis">1. 需求阶段</text:span></text:p>
          </table:table-cell>
          <table:table-cell table:style-name="表格2.A1" office:value-type="string">
            <text:p text:style-name="Table_20_Contents">确定产品要达到的安全等级 (SL 1-4)；识别受保护资产（如配置、固件、密钥）。</text:p>
          </table:table-cell>
          <table:table-cell table:style-name="表格2.A1" office:value-type="string">
            <text:p text:style-name="Table_20_Contents"><text:span text:style-name="Strong_20_Emphasis">《安全需求规格书 (SRD)》</text:span>：定义产品必须支持哪些 4-2 功能。</text:p>
          </table:table-cell>
        </table:table-row>
        <table:table-row>
          <table:table-cell table:style-name="表格2.A1" office:value-type="string">
            <text:p text:style-name="Table_20_Contents"><text:span text:style-name="Strong_20_Emphasis">2. 设计阶段</text:span></text:p>
          </table:table-cell>
          <table:table-cell table:style-name="表格2.A1" office:value-type="string">
            <text:p text:style-name="Table_20_Contents"><text:span text:style-name="Strong_20_Emphasis">威胁建模</text:span>：模拟攻击路径（如网络注入、侧信道分析）；设计<text:span text:style-name="Strong_20_Emphasis">纵深防御</text:span>架构。</text:p>
          </table:table-cell>
          <table:table-cell table:style-name="表格2.A1" office:value-type="string">
            <text:p text:style-name="Table_20_Contents"><text:span text:style-name="Strong_20_Emphasis">《威胁建模报告》</text:span>、<text:span text:style-name="Strong_20_Emphasis">《安全架构设计说明书 (SDS)》</text:span>：说明如何隔离非法访问。</text:p>
          </table:table-cell>
        </table:table-row>
        <table:table-row>
          <table:table-cell table:style-name="表格2.A1" office:value-type="string">
            <text:p text:style-name="Table_20_Contents"><text:span text:style-name="Strong_20_Emphasis">3. 开发阶段</text:span></text:p>
          </table:table-cell>
          <table:table-cell table:style-name="表格2.A1" office:value-type="string">
            <text:p text:style-name="Table_20_Contents">遵循安全编码标准（如 MISRA C）；进行<text:span text:style-name="Strong_20_Emphasis">静态代码分析 (SAST)</text:span>；管理第三方库。</text:p>
          </table:table-cell>
          <table:table-cell table:style-name="表格2.A1" office:value-type="string">
            <text:p text:style-name="Table_20_Contents"><text:span text:style-name="Strong_20_Emphasis">《软件成分表 (SBOM)》</text:span>：列出所有开源组件版本；<text:span text:style-name="Strong_20_Emphasis">《代码扫描修复报告》</text:span>。</text:p>
          </table:table-cell>
        </table:table-row>
        <table:table-row>
          <table:table-cell table:style-name="表格2.A1" office:value-type="string">
            <text:p text:style-name="Table_20_Contents"><text:span text:style-name="Strong_20_Emphasis">4. 验证阶段</text:span></text:p>
          </table:table-cell>
          <table:table-cell table:style-name="表格2.A1" office:value-type="string">
            <text:p text:style-name="Table_20_Contents">执行<text:span text:style-name="Strong_20_Emphasis">模糊测试 (Fuzzing)</text:span>、<text:span text:style-name="Strong_20_Emphasis">脆弱性扫描</text:span>和<text:span text:style-name="Strong_20_Emphasis">渗透测试</text:span>，验证 4-2 的各项指标。</text:p>
          </table:table-cell>
          <table:table-cell table:style-name="表格2.A1" office:value-type="string">
            <text:p text:style-name="Table_20_Contents"><text:span text:style-name="Strong_20_Emphasis">《安全验证与测试报告 (V&amp;V)》</text:span>：证明所有技术要求（FR）均测试通过。</text:p>
          </table:table-cell>
        </table:table-row>
        <table:table-row>
          <table:table-cell table:style-name="表格2.A1" office:value-type="string">
            <text:p text:style-name="Table_20_Contents"><text:span text:style-name="Strong_20_Emphasis">5. 发布与维护</text:span></text:p>
          </table:table-cell>
          <table:table-cell table:style-name="表格2.A1" office:value-type="string">
            <text:p text:style-name="Table_20_Contents">建立<text:span text:style-name="Strong_20_Emphasis">安全补丁管理流程</text:span>；监控 CVE 漏洞并及时通知客户。</text:p>
          </table:table-cell>
          <table:table-cell table:style-name="表格2.A1" office:value-type="string">
            <text:p text:style-name="Table_20_Contents"><text:span text:style-name="Strong_20_Emphasis">《缺陷/漏洞处理记录》</text:span>、<text:span text:style-name="Strong_20_Emphasis">《安全发布指南》</text:span>。</text:p>
          </table:table-cell>
        </table:table-row>
      </table:table>
      <text:p text:style-name="Horizontal_20_Line"><text:soft-page-break/></text:p>
      <text:p text:style-name="P3">二、 核心系统组件的“改造清单”（针对 4-2 技术要求）</text:p>
      <text:p text:style-name="P3">如果你们现有的产品要过认证，软件团队通常需要对以下组件进行深度改造：</text:p>
      <text:p text:style-name="Text_20_body">1. 认证与权限组件 (FR 1 &amp; 2)</text:p>
      <text:list xml:id="list247975052" text:style-name="L11">
        <text:list-item>
          <text:p text:style-name="P24"><text:span text:style-name="Strong_20_Emphasis">禁止默认密码</text:span>：出厂必须是唯一密码，或首次登录强制修改。</text:p>
        </text:list-item>
        <text:list-item>
          <text:p text:style-name="P24"><text:span text:style-name="Strong_20_Emphasis">多因子认证 (MFA)</text:span>：对于 SL 3 级别，管理接口需支持基于证书或动态令牌的登录。</text:p>
        </text:list-item>
        <text:list-item>
          <text:p text:style-name="P25"><text:span text:style-name="Strong_20_Emphasis">基于角色的访问控制 (RBAC)</text:span>：系统需区分“管理员、操作员、审计员”，权限不能混用。</text:p>
        </text:list-item>
      </text:list>
      <text:p text:style-name="Text_20_body">2. 固件完整性与启动组件 (FR 3)</text:p>
      <text:list xml:id="list3446903549" text:style-name="L12">
        <text:list-item>
          <text:p text:style-name="P26"><text:span text:style-name="Strong_20_Emphasis">安全启动 (Secure Boot)</text:span>：<text:span text:style-name="Strong_20_Emphasis">最难点</text:span>。必须利用硬件 RoT（如 MCU 的 TrustZone 或外挂 TPM）对 Bootloader 进行验签，确保固件未被篡改。</text:p>
        </text:list-item>
        <text:list-item>
          <text:p text:style-name="P27"><text:span text:style-name="Strong_20_Emphasis">固件更新签名</text:span>：所有 OTA 或本地升级文件必须经过数字签名，非法文件无法加载。</text:p>
        </text:list-item>
      </text:list>
      <text:p text:style-name="Text_20_body">3. 通信与数据保护组件 (FR 4)</text:p>
      <text:list xml:id="list1278119737" text:style-name="L13">
        <text:list-item>
          <text:p text:style-name="P28"><text:span text:style-name="Strong_20_Emphasis">全链路加密</text:span>：关闭 Telnet/HTTP 等明文协议，切换至 SSH/HTTPS/TLS 1.2+。</text:p>
        </text:list-item>
        <text:list-item>
          <text:p text:style-name="P29"><text:span text:style-name="Strong_20_Emphasis">敏感数据存储</text:span>：密码、私钥绝对不能明文写在代码里，必须存放在硬件安全模块（Secure Element）或加密的分区中。</text:p>
        </text:list-item>
      </text:list>
      <text:p text:style-name="Text_20_body">4. 资源与健壮性组件 (FR 7)</text:p>
      <text:list xml:id="list1538519287" text:style-name="L14">
        <text:list-item>
          <text:p text:style-name="P30"><text:span text:style-name="Strong_20_Emphasis">防 DoS 攻击</text:span>：限制最大连接数，防止网络流量灌满导致控制逻辑失效。</text:p>
        </text:list-item>
        <text:list-item>
          <text:p text:style-name="P31"><text:span text:style-name="Strong_20_Emphasis">看门狗与自愈</text:span>：确保受到攻击导致软件异常时，设备能安全复位并记录日志。</text:p>
        </text:list-item>
      </text:list>
      <text:p text:style-name="Horizontal_20_Line"/>
      <text:p text:style-name="P3">三、 研发人员需要填写的核心资料（细节补全）</text:p>
      <text:p text:style-name="Text_20_body">在通过认证（如 ISASecure 或 CB 认证）时，审核员会要求你提供：</text:p>
      <text:list xml:id="list1331527460" text:style-name="L15">
        <text:list-item>
          <text:p text:style-name="P32"><text:span text:style-name="Strong_20_Emphasis">能力矩阵表 (Requirement Mapping)</text:span>：列出 4-2 标准中的每一条需求（如 CR 1.1, CR 3.1），说明你的代码是怎么实现的，在哪个文件里实现的。</text:p>
        </text:list-item>
        <text:list-item>
          <text:p text:style-name="P32"><text:span text:style-name="Strong_20_Emphasis">漏洞说明文档</text:span>：如果你的产品使用了旧版 OpenSSL 且无法升级，你必须书面解释为什么它是安全的（例如：通过防火墙隔离）。</text:p>
        </text:list-item>
        <text:list-item>
          <text:p text:style-name="P33"><text:span text:style-name="Strong_20_Emphasis">密钥生命周期管理说明</text:span>：描述私钥从工厂烧录、存储、使用到报废的整个过程。</text:p>
        </text:list-item>
      </text:list>
      <text:p text:style-name="Horizontal_20_Line"/>
      <text:p text:style-name="P3">四、 针对性的进阶建议</text:p>
      <text:p text:style-name="Text_20_body">既然你是负责<text:span text:style-name="Strong_20_Emphasis">固件</text:span>的，这里有一个非常关键的技术选型建议：</text:p>
      <text:list xml:id="list3103846517" text:style-name="L16">
        <text:list-item>
          <text:p text:style-name="P34"><text:span text:style-name="Strong_20_Emphasis">硬件安全模块 (HSM/TPM)</text:span>：如果你们的目标是 <text:span text:style-name="Strong_20_Emphasis">SL 3</text:span>，不要试图用软件算法保护私钥，审核员通常不会认可。建议引入专门的安全芯片。</text:p>
        </text:list-item>
        <text:list-item>
          <text:p text:style-name="P35"><text:span text:style-name="Strong_20_Emphasis">SBOM 自动化工具</text:span>：现代审计非常看重 <text:span text:style-name="Strong_20_Emphasis">SBOM</text:span>（软件物料清单），建议尽早使用工具自动生成，避免手动统计开源漏洞。</text:p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简单来说，</text:p>
      <text:p text:style-name="Standard"><text:span text:style-name="Strong_20_Emphasis">IEC 62443-3-3</text:span> 是针对<text:span text:style-name="Strong_20_Emphasis">整个工业自动化控制系统（System）</text:span>的技术安全要求。</text:p>
      <text:p text:style-name="Standard">如果说你正在做的 <text:span text:style-name="Strong_20_Emphasis">4-2</text:span> 是针对你手里那块 <text:span text:style-name="Strong_20_Emphasis">RK3568 板子（组件）</text:span>，那么 <text:span text:style-name="Strong_20_Emphasis">3-3</text:span> 就是针对把这块板子、交换机、上位机软件、PLC 全部组装在一起后的那个<text:span text:style-name="Strong_20_Emphasis">集成系统</text:span>。</text:p>
      <text:p text:style-name="Standard">以下是研发人员理解 3-3 的核心逻辑：</text:p>
      <text:p text:style-name="P2">1. 3-3 与 4-2 的关系（系统 vs 组件）</text:p>
      <text:list xml:id="list951217721" text:style-name="L17">
        <text:list-item>
          <text:p text:style-name="P37"><text:span text:style-name="Strong_20_Emphasis">4-2（你负责的部分）</text:span>：规定单体设备（如你的嵌入式 Debian 终端）必须具备的能力（如：支持加密、有登录界面）。</text:p>
        </text:list-item>
        <text:list-item>
          <text:p text:style-name="P37"><text:span text:style-name="Strong_20_Emphasis">3-3（系统集成商负责）</text:span>：规定这些设备连在一起后，整体架构是否安全。</text:p>
        </text:list-item>
        <text:list-item>
          <text:p text:style-name="P36"><text:span text:style-name="Strong_20_Emphasis">研发视角</text:span>：如果你作为硬件厂商，你的产品（4-2 合规）是集成商构建安全系统（3-3 合规）的<text:span text:style-name="Strong_20_Emphasis">基石</text:span>。如果你的板子不支持 4-2，集成商就很难通过 3-3 认证。</text:p>
        </text:list-item>
      </text:list>
      <text:p text:style-name="P3">2. 核心内容：7 个基础需求 (FR)</text:p>
      <text:p text:style-name="P3">3-3 的架构与 4-2 完全一致，同样基于那 7 个 FR（身份识别、使用控制、完整性、机密性、数据流限制、及时响应、资源可用性）。</text:p>
      <text:p text:style-name="Text_20_body">不同点在于 3-3 强调的是<text:span text:style-name="Strong_20_Emphasis">系统级功能</text:span>：</text:p>
      <text:list xml:id="list3398269192" text:style-name="L18">
        <text:list-item>
          <text:p text:style-name="P38"><text:span text:style-name="Strong_20_Emphasis">系统级审计</text:span>：不仅是板子存日志，系统是否能把所有板子的日志汇总到中央服务器？</text:p>
        </text:list-item>
        <text:list-item>
          <text:p text:style-name="P38"><text:span text:style-name="Strong_20_Emphasis">区域与管道 (Zones &amp; Conduits)</text:span>：系统是否通过防火墙和 VLAN 将不同功能的设备隔离开？</text:p>
        </text:list-item>
        <text:list-item>
          <text:p text:style-name="P39"><text:span text:style-name="Strong_20_Emphasis">时间同步</text:span>：整个系统内的所有设备（包括你的 RK3568）时间是否统一？（否则审计日志对不上）。</text:p>
        </text:list-item>
      </text:list>
      <text:p text:style-name="P3">3. 研发人员为什么需要看 3-3？</text:p>
      <text:p text:style-name="Text_20_body">虽然你是做硬体开发的，但了解 3-3 能帮你更好地设计产品：</text:p>
      <text:list xml:id="list752467090" text:style-name="L19">
        <text:list-item>
          <text:p text:style-name="P40"><text:span text:style-name="Strong_20_Emphasis">系统联动</text:span>：3-3 要求系统能发现非法接入。因此，你的 RK3568 是否支持 <text:span text:style-name="Strong_20_Emphasis">802.1X 认证</text:span>（网络准入）就变得很重要。</text:p>
        </text:list-item>
        <text:list-item>
          <text:p text:style-name="P41"><text:span text:style-name="Strong_20_Emphasis">备份与恢复</text:span>：3-3 要求系统具备恢复能力。因此，你的固件是否支持 <text:span text:style-name="Strong_20_Emphasis">双镜像备份（A/B Partition）</text:span> 以便在更新失败时回滚，就是为了配合系统级的可靠性。</text:p>
        </text:list-item>
      </text:list>
      <text:p text:style-name="Text_20_body">4. 总结：3-3 关注的重点</text:p>
      <text:list xml:id="list617496470" text:style-name="L20">
        <text:list-item>
          <text:p text:style-name="P42"><text:span text:style-name="Strong_20_Emphasis">对象</text:span>：由多个组件构成的系统架构。</text:p>
        </text:list-item>
        <text:list-item>
          <text:p text:style-name="P42"><text:span text:style-name="Strong_20_Emphasis">执行者</text:span>：系统集成商 (SI) 或资产拥有者（工厂）。</text:p>
        </text:list-item>
        <text:list-item>
          <text:p text:style-name="P43"><text:span text:style-name="Strong_20_Emphasis">技术指标</text:span>：侧重于设备间的<text:span text:style-name="Strong_20_Emphasis">通信保护、边界防护、整体监控和抗灾恢复</text:span>。</text:p>
        </text:list-item>
      </text:list>
      <text:p text:style-name="P3"><text:span text:style-name="Strong_20_Emphasis">一句话总结</text:span>：<text:span text:style-name="Strong_20_Emphasis">4-2 是零件的安全，3-3 是整车的安全。</text:span> 零件如果不合格，整车肯定过不了 3-3。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1" style:font-family-complex="'Noto Sans CJK SC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1" style:font-family-complex="'Noto Sans CJK SC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09:10:12.437634043</meta:creation-date>
    <meta:generator>LibreOffice/7.3.7.2$Linux_X86_64 LibreOffice_project/30$Build-2</meta:generator>
    <dc:date>2026-03-16T13:30:36.096892081</dc:date>
    <meta:editing-duration>PT4H20M22S</meta:editing-duration>
    <meta:editing-cycles>3</meta:editing-cycles>
    <meta:document-statistic meta:table-count="2" meta:image-count="0" meta:object-count="0" meta:page-count="5" meta:paragraph-count="155" meta:word-count="3538" meta:character-count="4633" meta:non-whitespace-character-count="4302"/>
  </office:meta>
</office:document-meta>
</file>