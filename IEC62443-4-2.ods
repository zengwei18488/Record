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, 'Liberation Mono'" style:font-family-generic="modern" style:font-pitch="fixed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47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6.706cm"/>
    </style:style>
    <style:style style:name="co5" style:family="table-column">
      <style:table-column-properties fo:break-before="auto" style:column-width="9.966cm"/>
    </style:style>
    <style:style style:name="co6" style:family="table-column">
      <style:table-column-properties fo:break-before="auto" style:column-width="12.8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6.738cm" fo:break-before="auto" style:use-optimal-row-height="true"/>
    </style:style>
    <style:style style:name="ro6" style:family="table-row">
      <style:table-row-properties style:row-height="1.34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表格填写项（申明）：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STATEMENTS AND CONFORMITY EVIDENCES FOR SECURITY CAPABILITY REQUIREMEN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安全能力要求的声明和符合性证据</text:p>
          </table:table-cell>
          <table:table-cell table:number-columns-repeated="2"/>
          <table:table-cell office:value-type="string" calcext:value-type="string">
            <text:p>文档中对“安全声明”与“实现证据”的描述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NSURING COMPLIANCE WITH IEC 62443-4-2 CR4.3 USE OF CRYPTOGRAPHY: COMPREHENSIVE USE OF CRYPTOGRAPHY IN UBUNTU 22.04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確保符合 IEC 62443-4-2 中 CR4.3 的加密使用要求：在 Ubuntu 22.04 中全面使用加密技术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NSURING COMPLIANCE WITH IEC 62443-4-2 CR4.3 USE OF SECURITY GUIDELINES IN UBUNTU 22.04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确保遵守 IEC 62443-4-2 中 CR4.3 规定的乌班图 22.04 系统中安全指南的使用情况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number-columns-repeated="2"/>
          <table:table-cell office:value-type="string" calcext:value-type="string">
            <text:p>SBOM &amp; CEV</text:p>
          </table:table-cell>
          <table:table-cell office:value-type="string" calcext:value-type="string">
            <text:p># 导出包名、版本、来源信息</text:p>
            <text:p>dpkg-query -W -f='${Package}, ${Version}, ${License}\n' &gt; /etc/sbom_info.csv</text:p>
          </table:table-cell>
          <table:table-cell table:number-columns-repeated="3"/>
          <table:table-cell office:value-type="string" calcext:value-type="string">
            <text:p>OpenSCAP(官方合规性工具)</text:p>
            <text:p>特点：这是 Linux 领域最权威的合规性工具，支持 SCAP（安全内容自动化协议）</text:p>
          </table:table-cell>
        </table:table-row>
        <table:table-row table:style-name="ro1">
          <table:table-cell table:number-columns-repeated="8"/>
        </table:table-row>
        <table:table-row table:style-name="ro4">
          <table:table-cell table:number-columns-repeated="7"/>
          <table:table-cell office:value-type="string" calcext:value-type="string">
            <text:p><text:span text:style-name="T1">Lynis(系统安全审计工具)</text:span></text:p>
            <text:p><text:span text:style-name="T1">特点：它不只是扫 CVE，而是扫描整个 Debian 11 的系统加固情况</text:span>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number-columns-repeated="3"/>
          <table:table-cell office:value-type="string" calcext:value-type="string">
            <text:p>为了确保你的 Attachment 3 证据链完美，建议按以下方案操作：</text:p>
            <text:p/>
            <text:p>    CVE 扫描（必填）：使用 Trivy 或 Grype。重点关注 CR 3.11（漏洞识别）。</text:p>
            <text:p>    系统加固（加分）：使用 Lynis。重点关注 FR 1, 2, 5（账号、权限、网络加固）。</text:p>
            <text:p>    物料清单（必填）：使用 Syft（生成 SBOM）。重点关注 CR 3.10（软件成分透明）。</text:p>
            <text:p/>
            <text:p>5. 快速获取 Syft (生成 SBOM 的利器)</text:p>
            <text:p>审计员要求提供 SBOM (CR 3.10)，你可以配合 Grype 使用：</text:p>
            <text:p>bash</text:p>
            <text:p/>
            <text:p># 安装 Syft</text:p>
            <text:p>curl -sSfL https://raw.githubusercontent.com | sh -s -- -b /usr/local/bin</text:p>
            <text:p># 生成 SBOM 证据文件 (EV-44)</text:p>
            <text:p>syft dir:/ -o cyclonedx-json &gt; rk3568_debian_sbom.json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Grype、Trivy通过sbom生成cv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研发用途：如果你已经通过脚本生成了 CycloneDX 或 SPDX 格式的 SBOM 文件，用 Grype 扫描这个文件比直接扫文件系统更专业。</text:p>
          </table:table-cell>
        </table:table-row>
        <table:table-row table:style-name="ro6">
          <table:table-cell table:number-columns-repeated="7"/>
          <table:table-cell office:value-type="string" calcext:value-type="string">
            <text:p>curl -sSfL https://raw.githubusercontent.com | sh -s -- -b /usr/local/bin</text:p>
            <text:p># 扫描整个根目录并输出 JSON 格式（用于证据 EV-45）</text:p>
            <text:p>grype dir:/ -o json &gt; grype_cve_report.json</text:p>
          </table:table-cell>
        </table:table-row>
        <table:table-row table:style-name="ro1">
          <table:table-cell table:number-columns-repeated="8"/>
        </table:table-row>
        <table:table-row table:style-name="ro4">
          <table:table-cell table:number-columns-repeated="7"/>
          <table:table-cell office:value-type="string" calcext:value-type="string">
            <text:p>Debian Security Tracker (官方网页/脚本)</text:p>
            <text:p>特点：这是最原始、最权威的数据源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dio and BV编写，三个附件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软体改造项：</text:p>
          </table:table-cell>
          <table:table-cell table:number-columns-repeated="6"/>
        </table:table-row>
        <table:table-row table:style-name="ro7">
          <table:table-cell table:number-columns-repeated="3"/>
          <table:table-cell table:style-name="ce1" office:value-type="string" calcext:value-type="string">
            <text:p>CONFIG_AUD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Fus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启用 dm-verity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Debian 的系统分区</text:p>
            <text:p>Fstab 中配置为 ro (Read-Only)</text:p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" office:value-type="string" calcext:value-type="string">
            <text:p>BV (Boot Verification / Boot Verifier) —— 启动验证</text:p>
          </table:table-cell>
          <table:table-cell office:value-type="string" calcext:value-type="string">
            <text:p>安全启动</text:p>
          </table:table-cell>
          <table:table-cell office:value-type="string" calcext:value-type="string">
            <text:p>防回滚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7">
          <table:table-cell table:number-columns-repeated="2"/>
          <table:table-cell table:style-name="ce1" office:value-type="string" calcext:value-type="string">
            <text:p>启用硬件加密引擎 (Crypto Engine)</text:p>
          </table:table-cell>
          <table:table-cell office:value-type="string" calcext:value-type="string">
            <text:p>CONFIG_CRYPTO_DEV_ROCKCHIP=y</text:p>
            <text:p>CONFIG_CRYPTO_AES=y</text:p>
          </table:table-cell>
          <table:table-cell table:number-columns-repeated="4"/>
        </table:table-row>
        <table:table-row table:style-name="ro7">
          <table:table-cell table:number-columns-repeated="2"/>
          <table:table-cell table:style-name="ce1"/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密钥通过 RK3568 的 CA (Certificate Authority) 模块或 OP-TEE 进行管理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安装必要套件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禁用更新核心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清理不必要包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密钥复杂度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默认密码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限制roo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用户分级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TP时间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系统时间</text:p>
          </table:table-cell>
          <table:table-cell table:number-columns-repeated="6"/>
        </table:table-row>
      </table:table>
      <table:table table:name="工作表2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ce2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第一阶段：安全开发流程管理 (4-1 核心)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建立安全开发生命周期 (SDL) 流程手册 — [4-1 Practice 1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制定安全编码规范 (C/C++/Python/Shell) — [4-1 Practice 3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配置自动化静态代码分析 (SAST) 工具链 — [4-1 Practice 3: SI-2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建立开源及第三方组件 (SOUP) 准入管理流程 — [4-1 Practice 4: SUM-1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配置软件配置管理 (SCM) 及权限控制 — [4-1 Practice 1: SM-2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建立安全事件响应与漏洞处理规程 (PSIRT) — [4-1 Practice 8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制定安全验证与测试 (V&amp;V) 计划标准模板 — [4-1 Practice 5]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建立固件数字签名授权与安全分发规程 — [4-1 Practice 7]</text:p>
          </table:table-cell>
        </table:table-row>
        <table:table-row table:style-name="ro1">
          <table:table-cell/>
          <table:table-cell table:style-name="ce1" office:value-type="string" calcext:value-type="string">
            <text:p>第二阶段：威胁分析与架构设计 (对应 4-1 &amp; 4-2 FR 1, 2)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绘制系统数据流图 (DFD) 与受托边界定义 — [4-1 Practice 2: SR-2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执行系统级威胁建模分析 (STRIDE) — [4-1 Practice 2: SR-2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编写软件安全需求规格书 (SSRS) — [4-1 Practice 2: SR-1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设计 TrustZone (OP-TEE) 与 Debian 安全交互方案 — [4-2 CR 7.3, 7.4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设计硬件根信任 (RoT) 到应用层的全链路验证架构 — [4-2 CR 3.3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设计敏感数据 (密钥/凭据) 的物理隔离存储方案 — [4-2 CR 4.1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设计固件防回滚 (Anti-rollback) 硬件计数器机制 — [4-2 CR 3.4 RE-1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定义基于角色的访问控制 (RBAC) 矩阵与用户模型 — [4-2 CR 2.1]</text:p>
          </table:table-cell>
        </table:table-row>
        <table:table-row table:style-name="ro1">
          <table:table-cell/>
          <table:table-cell table:style-name="ce1" office:value-type="string" calcext:value-type="string">
            <text:p>第三阶段：固件与内核底层安全开发 (对应 4-2 FR 3, 4)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生成符合等级要求的 RSA/ECC 固件签名密钥对 — [4-2 CR 3.3, 3.4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生成并导出烧录至 RK3568 eFuse 的公钥哈希 — [4-2 CR 3.3 RE-1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配置并锁定 RK3568 MaskROM 安全引导参数 — [4-2 CR 3.3 RE-1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修改 U-Boot 源码以启用 FIT Image 签名校验 — [4-2 CR 3.3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实现 Bootloader 验签失败的自锁死响应逻辑 — [4-2 CR 2.10, 3.3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集成并配置 RK3568 硬件加密引擎 (CE) 内核驱动 — [4-2 CR 4.1, 4.2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配置 Linux 内核 dm-verity 完整性校验与根哈希固化 — [4-2 CR 3.9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在 Debian 11 中开启并配置强制访问控制 (AppArmor) — [4-2 CR 2.1, 3.2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实现硬件随机数发生器 (TRNG) 在 Debian 熵池中的调用 — [4-2 CR 4.3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配置 RK3568 内部看门狗 (Watchdog) 底层自愈逻辑 — [4-2 CR 7.7]</text:p>
          </table:table-cell>
        </table:table-row>
        <table:table-row table:style-name="ro1">
          <table:table-cell/>
          <table:table-cell table:style-name="ce1" office:value-type="string" calcext:value-type="string">
            <text:p>第四阶段：Debian 11 系统加固与防护 (对应 4-2 FR 1, 2, 5)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执行 Debian 11 镜像最小化裁剪 (移除多余包) — [4-2 CR 5.3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配置 PAM 实现密码复杂度及暴力破解锁定策略 — [4-2 CR 1.8, 1.10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执行默认账户清理与 UID 0 唯一性核查 — [4-2 CR 1.1, 1.12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配置 sudoers 权限限制及提权操作审计记录 — [4-2 CR 2.1, 2.12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配置 SSH 服务端安全加固 (算法/端口/超时) — [4-2 CR 1.14, 2.11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编写并部署 nftables 防火墙默认拒绝规则 — [4-2 CR 5.1, 5.2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配置 USB 存储自动挂载禁用与 Udev 访问规则 — [4-2 CR 2.4, 5.3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禁用调试串口 (UART) 的非授权 Shell 交互能力 — [4-2 CR 1.1, 1.2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配置基于加密协议的 NTP (Chrony/NTS) 时间同步 — [4-2 CR 6.1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实现基于硬件密钥的 LUKS 分区自动挂载脚本 — [4-2 CR 4.1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利用文件系统属性 (chattr) 保护关键配置不可变 — [4-2 CR 3.9]</text:p>
          </table:table-cell>
        </table:table-row>
        <table:table-row table:style-name="ro1">
          <table:table-cell/>
          <table:table-cell table:style-name="ce1" office:value-type="string" calcext:value-type="string">
            <text:p>第五阶段：审计、监控与安全维护 (对应 4-2 FR 6, 7)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配置 auditd 规则覆盖核心系统调用与文件变动 — [4-2 CR 2.8, 2.9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配置 rsyslog 加密实时外发日志至远程服务器 — [4-2 CR 6.1, 6.2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配置 logrotate 周期性转储与审计日志防篡改 — [4-2 CR 2.9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设置 cgroups 资源配额防止恶意 DoS 攻击 — [4-2 CR 7.1, 7.2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开发具备双镜像备份 (A/B Partition) 的安全更新客户端 — [4-2 CR 7.7]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实现更新包完整性校验、来源验证与防回滚检查 — [4-2 CR 3.4]</text:p>
          </table:table-cell>
        </table:table-row>
        <table:table-row table:style-name="ro1">
          <table:table-cell/>
          <table:table-cell table:style-name="ce1" office:value-type="string" calcext:value-type="string">
            <text:p>第六阶段：认证交付物与证据准备 (对应 4-1 &amp; 4-2 附件)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导出全系统软件物料清单 (SBOM) — [4-2 CR 3.10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执行全量 CVE 扫描并产出补丁分析报告 — [4-1 Practice 8 / 4-2 CR 3.11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编写《RK3568 加密实现与算法使用说明》 — [4-2 FR 4 所有项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编写《Debian 11 系统加固实施手册》 — [4-2 FR 1, 2, 5 所有项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填写 Compliance Checklist (附件 1) 技术描述列 — [4-2 所有 CR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执行全量安全功能验证 (V&amp;V) 并产出测试报告 — [4-1 Practice 5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执行负面安全测试并捕获证据日志 — [4-1 Practice 5: SVV-3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, 'Liberation Mono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10:03:20.737409727</meta:creation-date>
    <meta:generator>LibreOffice/7.3.7.2$Linux_X86_64 LibreOffice_project/30$Build-2</meta:generator>
    <dc:date>2026-03-16T16:33:02.375998296</dc:date>
    <meta:editing-duration>PT5H57M54S</meta:editing-duration>
    <meta:editing-cycles>15</meta:editing-cycles>
    <meta:document-statistic meta:table-count="2" meta:cell-count="96" meta:object-count="0"/>
    <meta:user-defined meta:name="Originator">Microsoft Word 14</meta:user-defined>
    <meta:user-defined meta:name="ProgId">Word.Document</meta:user-defined>
  </office:meta>
</office:document-meta>
</file>