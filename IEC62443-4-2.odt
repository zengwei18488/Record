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1.695cm"/>
    </style:style>
    <style:style style:name="表格1.B" style:family="table-column">
      <style:table-column-properties style:column-width="2.574cm"/>
    </style:style>
    <style:style style:name="表格1.C" style:family="table-column">
      <style:table-column-properties style:column-width="12.732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3.805cm"/>
    </style:style>
    <style:style style:name="表格2.B" style:family="table-column">
      <style:table-column-properties style:column-width="2.36cm"/>
    </style:style>
    <style:style style:name="表格2.C" style:family="table-column">
      <style:table-column-properties style:column-width="10.836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2.009cm"/>
    </style:style>
    <style:style style:name="表格3.B" style:family="table-column">
      <style:table-column-properties style:column-width="9.751cm"/>
    </style:style>
    <style:style style:name="表格3.C" style:family="table-column">
      <style:table-column-properties style:column-width="5.241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17cm" table:align="left"/>
    </style:style>
    <style:style style:name="表格4.A" style:family="table-column">
      <style:table-column-properties style:column-width="1.319cm"/>
    </style:style>
    <style:style style:name="表格4.B" style:family="table-column">
      <style:table-column-properties style:column-width="4.403cm"/>
    </style:style>
    <style:style style:name="表格4.C" style:family="table-column">
      <style:table-column-properties style:column-width="1.85cm"/>
    </style:style>
    <style:style style:name="表格4.D" style:family="table-column">
      <style:table-column-properties style:column-width="3.709cm"/>
    </style:style>
    <style:style style:name="表格4.E" style:family="table-column">
      <style:table-column-properties style:column-width="5.719cm"/>
    </style:style>
    <style:style style:name="表格4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officeooo:paragraph-rsid="0020e511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Horizontal_20_Line">
      <style:paragraph-properties style:writing-mode="lr-tb"/>
    </style:style>
    <style:style style:name="P4" style:family="paragraph" style:parent-style-name="Preformatted_20_Text" style:list-style-name="L23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23">
      <style:paragraph-properties style:writing-mode="lr-tb"/>
    </style:style>
    <style:style style:name="P6" style:family="paragraph" style:parent-style-name="Preformatted_20_Text" style:list-style-name="L25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25">
      <style:paragraph-properties style:writing-mode="lr-tb"/>
    </style:style>
    <style:style style:name="P8" style:family="paragraph" style:parent-style-name="Standard">
      <style:paragraph-properties fo:margin-top="0cm" fo:margin-bottom="0.499cm" style:contextual-spacing="false"/>
    </style:style>
    <style:style style:name="P9" style:family="paragraph" style:parent-style-name="Standard">
      <style:paragraph-properties fo:margin-top="0cm" fo:margin-bottom="0.499cm" style:contextual-spacing="false" style:writing-mode="lr-tb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fo:margin-top="0cm" fo:margin-bottom="0cm" style:contextual-spacing="false" style:writing-mode="lr-tb"/>
    </style:style>
    <style:style style:name="P12" style:family="paragraph" style:parent-style-name="Table_20_Contents">
      <style:paragraph-properties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margin-top="0cm" fo:margin-bottom="0cm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/>
    <style:style style:name="P32" style:family="paragraph" style:parent-style-name="Text_20_body" style:list-style-name="L10">
      <style:paragraph-properties fo:margin-top="0cm" fo:margin-bottom="0cm" style:contextual-spacing="false"/>
    </style:style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cm" fo:margin-bottom="0cm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 style:list-style-name="L13"/>
    <style:style style:name="P38" style:family="paragraph" style:parent-style-name="Text_20_body" style:list-style-name="L13">
      <style:paragraph-properties fo:margin-top="0cm" fo:margin-bottom="0cm" style:contextual-spacing="false"/>
    </style:style>
    <style:style style:name="P39" style:family="paragraph" style:parent-style-name="Text_20_body" style:list-style-name="L14"/>
    <style:style style:name="P40" style:family="paragraph" style:parent-style-name="Text_20_body" style:list-style-name="L14">
      <style:paragraph-properties fo:margin-top="0cm" fo:margin-bottom="0cm" style:contextual-spacing="false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cm" fo:margin-bottom="0cm" style:contextual-spacing="false"/>
    </style:style>
    <style:style style:name="P43" style:family="paragraph" style:parent-style-name="Text_20_body" style:list-style-name="L16"/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7">
      <style:paragraph-properties fo:margin-top="0cm" fo:margin-bottom="0cm" style:contextual-spacing="false" style:writing-mode="lr-tb"/>
    </style:style>
    <style:style style:name="P46" style:family="paragraph" style:parent-style-name="Text_20_body" style:list-style-name="L17">
      <style:paragraph-properties style:writing-mode="lr-tb"/>
    </style:style>
    <style:style style:name="P47" style:family="paragraph" style:parent-style-name="Text_20_body">
      <style:paragraph-properties fo:margin-top="0cm" fo:margin-bottom="0cm" style:contextual-spacing="false"/>
    </style:style>
    <style:style style:name="P48" style:family="paragraph" style:parent-style-name="Text_20_body">
      <style:paragraph-properties fo:margin-top="0cm" fo:margin-bottom="0cm" style:contextual-spacing="false" style:writing-mode="lr-tb"/>
    </style:style>
    <style:style style:name="P49" style:family="paragraph" style:parent-style-name="Text_20_body" style:list-style-name="L18">
      <style:paragraph-properties fo:margin-top="0cm" fo:margin-bottom="0cm" style:contextual-spacing="false" style:writing-mode="lr-tb"/>
    </style:style>
    <style:style style:name="P50" style:family="paragraph" style:parent-style-name="Text_20_body" style:list-style-name="L18">
      <style:paragraph-properties style:writing-mode="lr-tb"/>
    </style:style>
    <style:style style:name="P51" style:family="paragraph" style:parent-style-name="Text_20_body" style:list-style-name="L19">
      <style:paragraph-properties fo:margin-top="0cm" fo:margin-bottom="0cm" style:contextual-spacing="false" style:writing-mode="lr-tb"/>
    </style:style>
    <style:style style:name="P52" style:family="paragraph" style:parent-style-name="Text_20_body" style:list-style-name="L19">
      <style:paragraph-properties style:writing-mode="lr-tb"/>
    </style:style>
    <style:style style:name="P53" style:family="paragraph" style:parent-style-name="Text_20_body" style:list-style-name="L20">
      <style:paragraph-properties fo:margin-top="0cm" fo:margin-bottom="0cm" style:contextual-spacing="false" style:writing-mode="lr-tb"/>
    </style:style>
    <style:style style:name="P54" style:family="paragraph" style:parent-style-name="Text_20_body" style:list-style-name="L20">
      <style:paragraph-properties style:writing-mode="lr-tb"/>
    </style:style>
    <style:style style:name="P55" style:family="paragraph" style:parent-style-name="Text_20_body">
      <style:paragraph-properties style:writing-mode="lr-tb"/>
    </style:style>
    <style:style style:name="P56" style:family="paragraph" style:parent-style-name="Text_20_body" style:list-style-name="L21">
      <style:paragraph-properties fo:margin-top="0cm" fo:margin-bottom="0cm" style:contextual-spacing="false" style:writing-mode="lr-tb"/>
    </style:style>
    <style:style style:name="P57" style:family="paragraph" style:parent-style-name="Text_20_body" style:list-style-name="L21">
      <style:paragraph-properties style:writing-mode="lr-tb"/>
    </style:style>
    <style:style style:name="P58" style:family="paragraph" style:parent-style-name="Text_20_body" style:list-style-name="L22">
      <style:paragraph-properties fo:margin-top="0cm" fo:margin-bottom="0cm" style:contextual-spacing="false" style:writing-mode="lr-tb"/>
    </style:style>
    <style:style style:name="P59" style:family="paragraph" style:parent-style-name="Text_20_body" style:list-style-name="L22">
      <style:paragraph-properties style:writing-mode="lr-tb"/>
    </style:style>
    <style:style style:name="P60" style:family="paragraph" style:parent-style-name="Text_20_body" style:list-style-name="L23">
      <style:paragraph-properties fo:margin-top="0cm" fo:margin-bottom="0cm" style:contextual-spacing="false" style:writing-mode="lr-tb"/>
    </style:style>
    <style:style style:name="P61" style:family="paragraph" style:parent-style-name="Text_20_body" style:list-style-name="L23">
      <style:paragraph-properties style:writing-mode="lr-tb"/>
    </style:style>
    <style:style style:name="P62" style:family="paragraph" style:parent-style-name="Text_20_body" style:list-style-name="L24">
      <style:paragraph-properties fo:margin-top="0cm" fo:margin-bottom="0cm" style:contextual-spacing="false" style:writing-mode="lr-tb"/>
    </style:style>
    <style:style style:name="P63" style:family="paragraph" style:parent-style-name="Text_20_body" style:list-style-name="L24">
      <style:paragraph-properties style:writing-mode="lr-tb"/>
    </style:style>
    <style:style style:name="P64" style:family="paragraph" style:parent-style-name="Text_20_body" style:list-style-name="L25">
      <style:paragraph-properties fo:margin-top="0cm" fo:margin-bottom="0cm" style:contextual-spacing="false" style:writing-mode="lr-tb"/>
    </style:style>
    <style:style style:name="P65" style:family="paragraph" style:parent-style-name="Text_20_body" style:list-style-name="L25">
      <style:paragraph-properties style:writing-mode="lr-tb"/>
    </style:style>
    <style:style style:name="P66" style:family="paragraph" style:parent-style-name="Text_20_body" style:list-style-name="L26">
      <style:paragraph-properties fo:margin-top="0cm" fo:margin-bottom="0cm" style:contextual-spacing="false" style:writing-mode="lr-tb"/>
    </style:style>
    <style:style style:name="P67" style:family="paragraph" style:parent-style-name="Text_20_body" style:list-style-name="L26">
      <style:paragraph-properties style:writing-mode="lr-tb"/>
    </style:style>
    <style:style style:name="P68" style:family="paragraph" style:parent-style-name="Text_20_body" style:list-style-name="L27">
      <style:paragraph-properties fo:margin-top="0cm" fo:margin-bottom="0cm" style:contextual-spacing="false"/>
    </style:style>
    <style:style style:name="P69" style:family="paragraph" style:parent-style-name="Text_20_body" style:list-style-name="L27">
      <style:paragraph-properties style:writing-mode="lr-tb"/>
    </style:style>
    <style:style style:name="P70" style:family="paragraph" style:parent-style-name="Text_20_body" style:list-style-name="L28">
      <style:paragraph-properties fo:margin-top="0cm" fo:margin-bottom="0cm" style:contextual-spacing="false"/>
    </style:style>
    <style:style style:name="P71" style:family="paragraph" style:parent-style-name="Text_20_body" style:list-style-name="L28">
      <style:paragraph-properties fo:margin-top="0cm" fo:margin-bottom="0cm" style:contextual-spacing="false" style:writing-mode="lr-tb"/>
    </style:style>
    <style:style style:name="P72" style:family="paragraph" style:parent-style-name="Text_20_body" style:list-style-name="L28"/>
    <style:style style:name="P73" style:family="paragraph" style:parent-style-name="Text_20_body" style:list-style-name="L29">
      <style:paragraph-properties fo:margin-top="0cm" fo:margin-bottom="0cm" style:contextual-spacing="false"/>
    </style:style>
    <style:style style:name="P74" style:family="paragraph" style:parent-style-name="Text_20_body" style:list-style-name="L29">
      <style:text-properties officeooo:paragraph-rsid="0029f2d4"/>
    </style:style>
    <style:style style:name="P75" style:family="paragraph" style:parent-style-name="Text_20_body" style:list-style-name="L30">
      <style:paragraph-properties fo:margin-top="0cm" fo:margin-bottom="0cm" style:contextual-spacing="false"/>
    </style:style>
    <style:style style:name="P76" style:family="paragraph" style:parent-style-name="Text_20_body" style:list-style-name="L30"/>
    <style:style style:name="P77" style:family="paragraph" style:parent-style-name="Text_20_body" style:list-style-name="L31">
      <style:paragraph-properties fo:margin-top="0cm" fo:margin-bottom="0cm" style:contextual-spacing="false"/>
    </style:style>
    <style:style style:name="P78" style:family="paragraph" style:parent-style-name="Text_20_body" style:list-style-name="L31"/>
    <style:style style:name="P79" style:family="paragraph" style:parent-style-name="Text_20_body" style:list-style-name="L32">
      <style:paragraph-properties fo:margin-top="0cm" fo:margin-bottom="0cm" style:contextual-spacing="false"/>
    </style:style>
    <style:style style:name="P80" style:family="paragraph" style:parent-style-name="Text_20_body" style:list-style-name="L32">
      <style:paragraph-properties fo:margin-top="0cm" fo:margin-bottom="0cm" style:contextual-spacing="false" style:writing-mode="lr-tb"/>
    </style:style>
    <style:style style:name="P81" style:family="paragraph" style:parent-style-name="Text_20_body" style:list-style-name="L32"/>
    <style:style style:name="P82" style:family="paragraph" style:parent-style-name="Text_20_body" style:list-style-name="L33">
      <style:paragraph-properties fo:margin-top="0cm" fo:margin-bottom="0cm" style:contextual-spacing="false"/>
    </style:style>
    <style:style style:name="P83" style:family="paragraph" style:parent-style-name="Text_20_body" style:list-style-name="L33"/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4"/>
    <style:style style:name="P86" style:family="paragraph" style:parent-style-name="Text_20_body" style:list-style-name="L35">
      <style:paragraph-properties fo:margin-top="0cm" fo:margin-bottom="0cm" style:contextual-spacing="false"/>
    </style:style>
    <style:style style:name="P87" style:family="paragraph" style:parent-style-name="Text_20_body" style:list-style-name="L35">
      <style:paragraph-properties fo:margin-top="0cm" fo:margin-bottom="0cm" style:contextual-spacing="false" style:writing-mode="lr-tb"/>
    </style:style>
    <style:style style:name="P88" style:family="paragraph" style:parent-style-name="Text_20_body" style:list-style-name="L35"/>
    <style:style style:name="P89" style:family="paragraph" style:parent-style-name="Text_20_body" style:list-style-name="L36">
      <style:paragraph-properties fo:margin-top="0cm" fo:margin-bottom="0cm" style:contextual-spacing="false"/>
    </style:style>
    <style:style style:name="P90" style:family="paragraph" style:parent-style-name="Text_20_body" style:list-style-name="L36">
      <style:paragraph-properties fo:margin-top="0cm" fo:margin-bottom="0cm" style:contextual-spacing="false" style:writing-mode="lr-tb"/>
    </style:style>
    <style:style style:name="P91" style:family="paragraph" style:parent-style-name="Text_20_body" style:list-style-name="L36"/>
    <style:style style:name="P92" style:family="paragraph" style:parent-style-name="Text_20_body" style:list-style-name="L37">
      <style:paragraph-properties fo:margin-top="0cm" fo:margin-bottom="0cm" style:contextual-spacing="false"/>
    </style:style>
    <style:style style:name="P93" style:family="paragraph" style:parent-style-name="Text_20_body" style:list-style-name="L37"/>
    <style:style style:name="P94" style:family="paragraph" style:parent-style-name="Text_20_body" style:list-style-name="L38">
      <style:paragraph-properties fo:margin-top="0cm" fo:margin-bottom="0cm" style:contextual-spacing="false"/>
    </style:style>
    <style:style style:name="P95" style:family="paragraph" style:parent-style-name="Text_20_body" style:list-style-name="L38">
      <style:paragraph-properties fo:margin-top="0cm" fo:margin-bottom="0cm" style:contextual-spacing="false" style:writing-mode="lr-tb"/>
    </style:style>
    <style:style style:name="P96" style:family="paragraph" style:parent-style-name="Text_20_body" style:list-style-name="L38"/>
    <style:style style:name="P97" style:family="paragraph" style:parent-style-name="Text_20_body" style:list-style-name="L39"/>
    <style:style style:name="P98" style:family="paragraph" style:parent-style-name="Text_20_body" style:list-style-name="L39">
      <style:paragraph-properties fo:margin-top="0cm" fo:margin-bottom="0cm" style:contextual-spacing="false"/>
    </style:style>
    <style:style style:name="P99" style:family="paragraph" style:parent-style-name="Text_20_body" style:list-style-name="L39">
      <style:paragraph-properties fo:margin-top="0cm" fo:margin-bottom="0cm" style:contextual-spacing="false" style:writing-mode="lr-tb"/>
    </style:style>
    <style:style style:name="P100" style:family="paragraph" style:parent-style-name="Text_20_body" style:list-style-name="L40">
      <style:paragraph-properties fo:margin-top="0cm" fo:margin-bottom="0cm" style:contextual-spacing="false"/>
    </style:style>
    <style:style style:name="P101" style:family="paragraph" style:parent-style-name="Text_20_body" style:list-style-name="L40">
      <style:paragraph-properties style:writing-mode="lr-tb"/>
    </style:style>
    <style:style style:name="P102" style:family="paragraph" style:parent-style-name="Text_20_body" style:list-style-name="L41">
      <style:paragraph-properties fo:margin-top="0cm" fo:margin-bottom="0cm" style:contextual-spacing="false"/>
    </style:style>
    <style:style style:name="P103" style:family="paragraph" style:parent-style-name="Text_20_body" style:list-style-name="L41"/>
    <style:style style:name="P104" style:family="paragraph" style:parent-style-name="Text_20_body" style:list-style-name="L42">
      <style:paragraph-properties fo:margin-top="0cm" fo:margin-bottom="0cm" style:contextual-spacing="false"/>
    </style:style>
    <style:style style:name="P105" style:family="paragraph" style:parent-style-name="Text_20_body" style:list-style-name="L42">
      <style:paragraph-properties fo:margin-top="0cm" fo:margin-bottom="0cm" style:contextual-spacing="false" style:writing-mode="lr-tb"/>
    </style:style>
    <style:style style:name="P106" style:family="paragraph" style:parent-style-name="Text_20_body" style:list-style-name="L42">
      <style:paragraph-properties style:writing-mode="lr-tb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针对 </text:p>
      <text:p text:style-name="P10"><text:span text:style-name="Strong_20_Emphasis">Rockchip RK3568</text:span> 平台运行 <text:span text:style-name="Strong_20_Emphasis">Debian (Linux)</text:span> 的开发环境，要达到 <text:span text:style-name="Strong_20_Emphasis">IEC 62443-4-2</text:span> 的认证要求，软件和固件研发团队的任务将非常具体。RK3568 具备强大的硬件安全特性（如 ARM TrustZone、Crypto Engine），这为实现 <text:span text:style-name="Strong_20_Emphasis">SL 2</text:span> 甚至 <text:span text:style-name="Strong_20_Emphasis">SL 3</text:span> 提供了良好的基础。</text:p>
      <text:p text:style-name="P10">以下是针对该平台的详细<text:span text:style-name="Strong_20_Emphasis">研发执行指南</text:span>：</text:p>
      <text:p text:style-name="P10">1. 核心系统组件改造（技术实现重点）</text:p>
      <text:p text:style-name="P10">作为软件/固件开发人员，你需要重点改造以下四个层面：</text:p>
      <text:p text:style-name="P10">A. 硬件根信任与安全启动 (Secure Boot) —— 对应 FR 3.1, 3.2</text:p>
      <text:p text:style-name="P9">这是过审的核心。你不能只在 Debian 层做防护，必须从底层链条开始：</text:p>
      <text:list xml:id="list2571034515" text:style-name="L17">
        <text:list-item>
          <text:p text:style-name="P45"><text:span text:style-name="Strong_20_Emphasis">eFuse 烧录</text:span>：将公钥哈希烧录进 RK3568 的 eFuse 中。</text:p>
        </text:list-item>
        <text:list-item>
          <text:p text:style-name="P45"><text:span text:style-name="Strong_20_Emphasis">信任链 (Chain of Trust)</text:span>：</text:p>
          <text:list>
            <text:list-item>
              <text:p text:style-name="P45"><text:span text:style-name="Strong_20_Emphasis">MaskROM</text:span> 验证 <text:span text:style-name="Strong_20_Emphasis">IDB/U-Boot SPL</text:span>。</text:p>
            </text:list-item>
            <text:list-item>
              <text:p text:style-name="P45"><text:span text:style-name="Strong_20_Emphasis">U-Boot</text:span> 验证 <text:span text:style-name="Strong_20_Emphasis">Linux Kernel (FIT Image)</text:span>。</text:p>
            </text:list-item>
            <text:list-item>
              <text:p text:style-name="P45"><text:span text:style-name="Strong_20_Emphasis">Kernel</text:span> 通过 <text:span text:style-name="Strong_20_Emphasis">dm-verity</text:span> 验证 <text:span text:style-name="Strong_20_Emphasis">Debian 根文件系统 (Rootfs)</text:span>。</text:p>
            </text:list-item>
          </text:list>
        </text:list-item>
        <text:list-item>
          <text:p text:style-name="P46"><text:span text:style-name="Strong_20_Emphasis">任务</text:span>：你需要配置 Rockchip 的 <text:span text:style-name="Source_20_Text">RKSignTool</text:span> 进行固件签名，并确保 Bootloader 锁定，不允许未授权的 USB 启动或串口中断。</text:p>
        </text:list-item>
      </text:list>
      <text:p text:style-name="P48">B. 身份认证与访问控制 —— 对应 FR 1.1, 2.1</text:p>
      <text:p text:style-name="P55">Debian 默认配置通常太宽松，需要进行“系统加固”：</text:p>
      <text:list xml:id="list675309417" text:style-name="L18">
        <text:list-item>
          <text:p text:style-name="P49"><text:span text:style-name="Strong_20_Emphasis">禁用弱服务</text:span>：彻底移除 <text:span text:style-name="Source_20_Text">telnet</text:span>、<text:span text:style-name="Source_20_Text">ftp</text:span>、<text:span text:style-name="Source_20_Text">rlogin</text:span>。仅保留 <text:span text:style-name="Source_20_Text">SSH</text:span> 且必须禁用 <text:span text:style-name="Source_20_Text">root</text:span> 直接登录。</text:p>
        </text:list-item>
        <text:list-item>
          <text:p text:style-name="P49"><text:span text:style-name="Strong_20_Emphasis">PAM 模块配置</text:span>：配置 <text:span text:style-name="Source_20_Text">/etc/pam.d/common-password</text:span>，强制执行密码复杂度（长度、大小写、特殊字符）和尝试失败锁定。</text:p>
        </text:list-item>
        <text:list-item>
          <text:p text:style-name="P50"><text:span text:style-name="Strong_20_Emphasis">RBAC 实现</text:span>：利用 Linux 的 <text:span text:style-name="Source_20_Text">sudoers</text:span> 和 <text:span text:style-name="Source_20_Text">User Groups</text:span>，为“操作员”和“管理员”分配不同权限，不能共用一个账号。</text:p>
        </text:list-item>
      </text:list>
      <text:p text:style-name="P55">C. 数据加密与密钥管理 —— 对应 FR 4.1, 4.2</text:p>
      <text:list xml:id="list287074146" text:style-name="L19">
        <text:list-item>
          <text:p text:style-name="P51"><text:span text:style-name="Strong_20_Emphasis">利用 RK3568 加密引擎</text:span>：不要使用纯软件加密。在 Linux 中配置 <text:span text:style-name="Source_20_Text">dm-crypt</text:span> 对存放配置和敏感数据的分区进行全盘加密（LUKS）。</text:p>
        </text:list-item>
        <text:list-item>
          <text:p text:style-name="P52"><text:span text:style-name="Strong_20_Emphasis">密钥存放</text:span>：绝对不要把私钥存放在 <text:span text:style-name="Source_20_Text">/etc/</text:span> 目录下。应通过 <text:span text:style-name="Source_20_Text">TEE</text:span> (Trusted Execution Environment，如 OP-TEE) 或 RK3568 的安全存储区（Secure Storage）来管理。</text:p>
        </text:list-item>
      </text:list>
      <text:p text:style-name="P55">D. 安全日志与审计 —— 对应 FR 6.1, 6.2</text:p>
      <text:list xml:id="list503993736" text:style-name="L20">
        <text:list-item>
          <text:p text:style-name="P53"><text:span text:style-name="Strong_20_Emphasis">系统日志</text:span>：配置 <text:span text:style-name="Source_20_Text">rsyslog</text:span> 或 <text:span text:style-name="Source_20_Text">systemd-journald</text:span> 记录所有登录尝试、提权行为和关键进程崩溃。</text:p>
        </text:list-item>
        <text:list-item>
          <text:p text:style-name="P54"><text:span text:style-name="Strong_20_Emphasis">防篡改</text:span>：如果是 SL 3 级要求，日志必须实时发送到远程日志服务器，防止攻击者本地删除。</text:p>
        </text:list-item>
      </text:list>
      <text:p text:style-name="P3"/>
      <text:p text:style-name="P48">2. 各阶段需要填写的资料清单（针对审计）</text:p>
      <text:p text:style-name="P48">在每个开发节点，你需要准备好以下文档备查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Heading">阶段</text:p>
          </table:table-cell>
          <table:table-cell table:style-name="表格1.A1" office:value-type="string">
            <text:p text:style-name="Table_20_Heading">资料名称</text:p>
          </table:table-cell>
          <table:table-cell table:style-name="表格1.A1" office:value-type="string">
            <text:p text:style-name="Table_20_Heading">研发人员填写的重点内容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设计阶段</text:span></text:p>
          </table:table-cell>
          <table:table-cell table:style-name="表格1.A1" office:value-type="string">
            <text:p text:style-name="Table_20_Contents"><text:span text:style-name="Strong_20_Emphasis">攻击面分析表</text:span></text:p>
          </table:table-cell>
          <table:table-cell table:style-name="表格1.A1" office:value-type="string">
            <text:p text:style-name="Table_20_Contents">列出 RK3568 的物理接口（USB, Debug UART, Ethernet）及软件端口，说明关闭或防护理由。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实现阶段</text:span></text:p>
          </table:table-cell>
          <table:table-cell table:style-name="表格1.A1" office:value-type="string">
            <text:p text:style-name="Table_20_Contents"><text:span text:style-name="Strong_20_Emphasis">SBOM (软件</text:span><text:soft-page-break/><text:span text:style-name="Strong_20_Emphasis">物料清单)</text:span></text:p>
          </table:table-cell>
          <table:table-cell table:style-name="表格1.A1" office:value-type="string">
            <text:p text:style-name="P12">统计 Debian 系统中所有使用的软件包（用 <text:span text:style-name="Source_20_Text">dpkg --get-selections</text:span> <text:soft-page-break/>导出），特别是 OpenSSL 等加密库版本。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实现阶段</text:span></text:p>
          </table:table-cell>
          <table:table-cell table:style-name="表格1.A1" office:value-type="string">
            <text:p text:style-name="Table_20_Contents"><text:span text:style-name="Strong_20_Emphasis">安全配置手册</text:span></text:p>
          </table:table-cell>
          <table:table-cell table:style-name="表格1.A1" office:value-type="string">
            <text:p text:style-name="Table_20_Contents">详细记录你对 Debian 镜像做的所有修改（如禁用的服务、修改的配置文件、内核编译选项）。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验证阶段</text:span></text:p>
          </table:table-cell>
          <table:table-cell table:style-name="表格1.A1" office:value-type="string">
            <text:p text:style-name="Table_20_Contents"><text:span text:style-name="Strong_20_Emphasis">漏洞分析报告 (VEX)</text:span></text:p>
          </table:table-cell>
          <table:table-cell table:style-name="表格1.A1" office:value-type="string">
            <text:p text:style-name="Table_20_Contents">对 SBOM 中的组件进行 CVE 扫描，若有已知漏洞但无法修复，需填写“补偿性控制措施”（如：虽然 SSH 有漏洞，但仅允许内网访问）。</text:p>
          </table:table-cell>
        </table:table-row>
      </table:table>
      <text:p text:style-name="P3"/>
      <text:p text:style-name="P55">3. 给研发人员的实战建议（避坑指南）</text:p>
      <text:list xml:id="list1630442378" text:style-name="L21">
        <text:list-item>
          <text:p text:style-name="P56"><text:span text:style-name="Strong_20_Emphasis">串口安全 (Debug UART)</text:span>：RK3568 的调试串口默认是开启的，且通常直接进 Root Shell。在认证产品中，<text:span text:style-name="Strong_20_Emphasis">必须</text:span>在 U-Boot 和 Kernel 启动参数中禁用控制台输出，或设置串口登录密码。</text:p>
        </text:list-item>
        <text:list-item>
          <text:p text:style-name="P56"><text:span text:style-name="Strong_20_Emphasis">不必要的包清理</text:span>：Debian 自带很多开发工具（gcc, gdb, python）。认证要求“最小化安装”，请务必在最终镜像中剔除这些可能被黑客利用的工具。</text:p>
        </text:list-item>
        <text:list-item>
          <text:p text:style-name="P57"><text:span text:style-name="Strong_20_Emphasis">时钟同步 (NTP)</text:span>：审计日志的准确性依赖时间。必须配置加密的 NTP (NTS) 或硬件 RTC，确保所有安全事件的时间戳是可信的。</text:p>
        </text:list-item>
      </text:list>
      <text:p text:style-name="P48"/>
      <text:p text:style-name="P48"/>
      <text:p text:style-name="P11">在<text:span text:style-name="Strong_20_Emphasis">IEC 62443-4-2</text:span> 标准中，每个 <text:span text:style-name="Strong_20_Emphasis">FR</text:span>（基础要求）确实被细分为多个具体的 <text:span text:style-name="Strong_20_Emphasis">CR</text:span>（组件要求），而且部分 CR 还会带有 <text:span text:style-name="Strong_20_Emphasis">RE</text:span>（强化要求，Requirement Enhancement）。</text:p>
      <text:p text:style-name="P48"/>
      <text:p text:style-name="P48"/>
      <text:p text:style-name="P48"><text:span text:style-name="Strong_20_Emphasis">Rockchip RK3568</text:span> 上运行 <text:span text:style-name="Strong_20_Emphasis">Debian</text:span>，研发工作的重点将分为两部分：底层硬件信任链（由 Rockchip SDK 处理）和上层操作系统加固（由 Debian 配置处理）。</text:p>
      <text:p text:style-name="P48">以下是为您整理的<text:span text:style-name="Strong_20_Emphasis">实战操作指南</text:span>：</text:p>
      <text:p text:style-name="P3"/>
      <text:p text:style-name="P48">第一部分：RK3568 底层安全启动 (Secure Boot) 配置流程</text:p>
      <text:p text:style-name="P55">这是证明产品具备 <text:span text:style-name="Strong_20_Emphasis">FR 3.1 (系统完整性)</text:span> 的核心。</text:p>
      <text:list xml:id="list590418045" text:style-name="L22">
        <text:list-item>
          <text:p text:style-name="P58"><text:span text:style-name="Strong_20_Emphasis">生成密钥 (Key Generation)</text:span>：<text:line-break/>使用 Rockchip 提供的 <text:span text:style-name="Source_20_Text">RKSignTool</text:span> 生成 RSA 或 ECC 密钥对。<text:span text:style-name="Strong_20_Emphasis">注意：</text:span> 私钥必须保存在研发服务器的安全硬件中，不能留在个人电脑上。</text:p>
        </text:list-item>
        <text:list-item>
          <text:p text:style-name="P58"><text:span text:style-name="Strong_20_Emphasis">烧录 eFuse (OTP)</text:span>：<text:line-break/>将公钥的哈希值（Hash）烧录进 RK3568 芯片内部的 eFuse。一旦烧录，芯片启动时只会加载经过对应私钥签名的固件。</text:p>
          <text:list>
            <text:list-item>
              <text:p text:style-name="P58"><text:span text:style-name="Emphasis">研发任务</text:span>：编写烧录脚本，并在生产环节确保 <text:span text:style-name="Strong_20_Emphasis">Secure Boot En</text:span> 标志位被正确置位。</text:p>
            </text:list-item>
          </text:list>
        </text:list-item>
        <text:list-item>
          <text:p text:style-name="P58"><text:span text:style-name="Strong_20_Emphasis">签名镜像 (Signing)</text:span>：<text:line-break/>修改 SDK 的 <text:span text:style-name="Source_20_Text">package-file</text:span>，确保所有组件（<text:span text:style-name="Source_20_Text">MiniLoaderAll.bin</text:span>, <text:span text:style-name="Source_20_Text">uboot.img</text:span>, <text:span text:style-name="Source_20_Text">boot.img</text:span>）都经过签名。</text:p>
        </text:list-item>
        <text:list-item>
          <text:p text:style-name="P58"><text:span text:style-name="Strong_20_Emphasis">启用 dm-verity (关键)</text:span>：<text:line-break/>对于 Debian 的根文件系统（Rootfs），必须在内核中启用 <text:span text:style-name="Source_20_Text">dm-verity</text:span>。</text:p>
          <text:list>
            <text:list-item>
              <text:p text:style-name="P59"><text:span text:style-name="Emphasis">原理</text:span>：它会对整个分区建立哈希树。如果黑客在 Debian 运行期间修改了某个系统文件，内核会立即检测到并触发系统重启或停止，防止攻击扩大。</text:p>
            </text:list-item>
          </text:list>
        </text:list-item>
      </text:list>
      <text:p text:style-name="P3"/>
      <text:p text:style-name="P48"><text:soft-page-break/>第二部分：Debian 系统加固 (Hardening) 命令清单</text:p>
      <text:p text:style-name="P48">这是满足 <text:span text:style-name="Strong_20_Emphasis">FR 1 (认证)</text:span>、<text:span text:style-name="Strong_20_Emphasis">FR 2 (授权)</text:span> 和 <text:span text:style-name="Strong_20_Emphasis">FR 5 (限制数据流)</text:span> 的具体手段。</text:p>
      <text:p text:style-name="P55">1. 账号与认证加固</text:p>
      <text:list xml:id="list2244955331" text:style-name="L23">
        <text:list-item>
          <text:p text:style-name="P60"><text:span text:style-name="Strong_20_Emphasis">强制修改默认密码</text:span>：<text:line-break/>在镜像制作脚本中加入：<text:span text:style-name="Source_20_Text">chage -d 0 root</text:span>（强制下次登录改密码）。</text:p>
        </text:list-item>
        <text:list-item>
          <text:p text:style-name="P60"><text:span text:style-name="Strong_20_Emphasis">限制 Root 登录</text:span>：<text:line-break/>修改 <text:span text:style-name="Source_20_Text">/etc/ssh/sshd_config</text:span>：</text:p>
          <text:p text:style-name="P61">bash</text:p>
          <text:p text:style-name="P5"><text:span text:style-name="Source_20_Text">PermitRootLogin no <text:s text:c="12"/># 禁止 Root 远程登录</text:span></text:p>
          <text:p text:style-name="P5"><text:span text:style-name="Source_20_Text">MaxAuthTries 3 <text:s text:c="16"/># 密码错3次锁定</text:span></text:p>
          <text:p text:style-name="P4"><text:span text:style-name="Source_20_Text">ClientAliveInterval 300 <text:s text:c="7"/># 5分钟无操作自动断开</text:span></text:p>
          <text:p text:style-name="P60">请谨慎使用此类代码。</text:p>
        </text:list-item>
        <text:list-item>
          <text:p text:style-name="P61"><text:span text:style-name="Strong_20_Emphasis">密码复杂度限制</text:span>：<text:line-break/>安装 <text:span text:style-name="Source_20_Text">libpam-pwquality</text:span>，修改 <text:span text:style-name="Source_20_Text">/etc/pam.d/common-password</text:span>：<text:line-break/><text:span text:style-name="Source_20_Text">password requisite pam_pwquality.so retry=3 minlen=12 ucredit=-1 lcredit=-1 dcredit=-1 ocredit=-1</text:span>（要求至少12位，包含大小写数字符号）。</text:p>
        </text:list-item>
      </text:list>
      <text:p text:style-name="P55">2. 最小化攻击面 (Attack Surface Reduction)</text:p>
      <text:list xml:id="list1891249163" text:style-name="L24">
        <text:list-item>
          <text:p text:style-name="P62"><text:span text:style-name="Strong_20_Emphasis">清理多余服务</text:span>：<text:line-break/>执行 <text:span text:style-name="Source_20_Text">systemctl list-unit-files --type=service</text:span> 查看。<text:line-break/><text:span text:style-name="Strong_20_Emphasis">必删/禁用</text:span>：<text:span text:style-name="Source_20_Text">avahi-daemon</text:span> (发现服务), <text:span text:style-name="Source_20_Text">telnet</text:span>, <text:span text:style-name="Source_20_Text">rsh</text:span>, <text:span text:style-name="Source_20_Text">nfs-common</text:span>（除非必要）。</text:p>
        </text:list-item>
        <text:list-item>
          <text:p text:style-name="P62"><text:span text:style-name="Strong_20_Emphasis">禁用不必要的硬件接口</text:span>：<text:line-break/>在 Device Tree (<text:span text:style-name="Source_20_Text">.dts</text:span>) 中禁用未使用的 USB 口、蓝牙或 WiFi，减少物理攻击点。</text:p>
        </text:list-item>
        <text:list-item>
          <text:p text:style-name="P63"><text:span text:style-name="Strong_20_Emphasis">关闭调试串口回显</text:span>：<text:line-break/>修改 <text:span text:style-name="Source_20_Text">cmdline.txt</text:span>，移除 <text:span text:style-name="Source_20_Text">console=ttyFIQ0</text:span> 或在 <text:span text:style-name="Source_20_Text">inittab</text:span> 中注释掉 <text:span text:style-name="Source_20_Text">getty</text:span> 进程，防止通过串口线直接获取 Shell。</text:p>
        </text:list-item>
      </text:list>
      <text:p text:style-name="P55">3. 网络加固</text:p>
      <text:list xml:id="list296189474" text:style-name="L25">
        <text:list-item>
          <text:p text:style-name="P64"><text:span text:style-name="Strong_20_Emphasis">配置防火墙 (nftables/iptables)</text:span>：<text:line-break/>默认策略设为 <text:span text:style-name="Source_20_Text">DROP</text:span>，仅允许业务端口。</text:p>
        </text:list-item>
        <text:list-item>
          <text:p text:style-name="P64"><text:span text:style-name="Strong_20_Emphasis">内核参数加固</text:span>：<text:line-break/>修改 <text:span text:style-name="Source_20_Text">/etc/sysctl.conf</text:span>：</text:p>
          <text:p text:style-name="P65">bash</text:p>
          <text:p text:style-name="P7"><text:span text:style-name="Source_20_Text">net.ipv4.conf.all.accept_redirects = 0 <text:s text:c="2"/># 防止ICMP重定向攻击</text:span></text:p>
          <text:p text:style-name="P7"><text:span text:style-name="Source_20_Text">net.ipv4.conf.all.rp_filter = 1 <text:s text:c="9"/># 启用反向路径过滤，防IP欺骗</text:span></text:p>
          <text:p text:style-name="P6"><text:span text:style-name="Source_20_Text">kernel.kptr_restrict = 2 <text:s text:c="16"/># 隐藏内核符号地址</text:span></text:p>
          <text:p text:style-name="P65">请谨慎使用此类代码。</text:p>
        </text:list-item>
      </text:list>
      <text:p text:style-name="P3"/>
      <text:p text:style-name="P48"><text:soft-page-break/>第三部分：SBOM 与漏洞管理（研发必填资料）</text:p>
      <text:p text:style-name="P55">为了符合 <text:span text:style-name="Strong_20_Emphasis">IEC 62443-4-1</text:span> 的流程要求，你需要建立以下自动化流程：</text:p>
      <text:list xml:id="list3246125298" text:style-name="L26">
        <text:list-item>
          <text:p text:style-name="P66"><text:span text:style-name="Strong_20_Emphasis">导出软件包清单</text:span>：<text:line-break/>在镜像构建完成后，运行：<text:line-break/><text:span text:style-name="Source_20_Text">dpkg-query -W -f='${Package}, ${Version}, ${Architecture}\n' &gt; product_sbom.csv</text:span></text:p>
        </text:list-item>
        <text:list-item>
          <text:p text:style-name="P66"><text:span text:style-name="Strong_20_Emphasis">自动化扫描</text:span>：<text:line-break/>使用开源工具如 <text:span text:style-name="Strong_20_Emphasis">Trivy</text:span> 或 <text:span text:style-name="Strong_20_Emphasis">Grype</text:span> 对导出的清单进行扫描：<text:line-break/><text:span text:style-name="Source_20_Text">trivy fs /path/to/debian/rootfs</text:span></text:p>
          <text:list>
            <text:list-item>
              <text:p text:style-name="P67"><text:span text:style-name="Emphasis">研发文档</text:span>：如果扫描出高危漏洞 (Critical)，你必须在 <text:span text:style-name="Strong_20_Emphasis">《漏洞处置报告》</text:span> 中记录是“升级了版本”还是“通过防火墙规避了风险”。</text:p>
            </text:list-item>
          </text:list>
        </text:list-item>
      </text:list>
      <text:p text:style-name="Standard"/>
      <text:p text:style-name="Standard"/>
      <text:p text:style-name="Standard"/>
      <text:p text:style-name="Standard">在<text:span text:style-name="Strong_20_Emphasis">IEC 62443-4-2</text:span> 的认证评审表（通常称为 <text:span text:style-name="Strong_20_Emphasis">Compliance Matrix</text:span> 或 <text:span text:style-name="Strong_20_Emphasis">Checklist</text:span>）中，这些列构成了<text:span text:style-name="Strong_20_Emphasis">技术合规性的完整证据链</text:span>。</text:p>
      <text:p text:style-name="Standard"/>
      <text:p text:style-name="Standard">CCSC 的全称是 Common Component Security Constraints（通用组件安全约束）</text:p>
      <text:p text:style-name="Standard">编号 <text:tab/>名称<text:tab/>研发需要在文档中填写的重点内容</text:p>
      <text:p text:style-name="Standard">CCSC 1<text:tab/>系统安全特性支持<text:tab/>描述你的 RK3568 终端如何融入整体工业系统。例如：是否支持 NTP 时间同步（方便审计）、是否支持系统级的资产发现。</text:p>
      <text:p text:style-name="Standard">CCSC 2<text:tab/>补偿性安全措施<text:tab/>如果 4-2 中的某条技术要求（CR）你的板子硬性做不到，你必须在此说明如何通过系统级手段（如防火墙、VLAN）来弥补。</text:p>
      <text:p text:style-name="Standard">CCSC 3<text:tab/>最小特权原则<text:tab/>证明你的固件设计遵循“最小权限”。例如：Debian 中的业务进程不使用 root 权限运行，或者关闭了不必要的内核模块。</text:p>
      <text:p text:style-name="Standard">CCSC 4<text:tab/>4-1 流程合规<text:tab/>最关键的一条。声明该产品是完全按照 IEC 62443-4-1 安全开发生命周期（SDL）流程开发的。</text:p>
      <text:p text:style-name="Standard"/>
      <text:p text:style-name="Standard"/>
      <text:p text:style-name="Standard">作为 RK3568 的软件研发人员，你需要按照以下逻辑理解并填写每一列：</text:p>
      <text:p text:style-name="Standard">1. 各列含义及填写指南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Heading">列名 (Column)</text:p>
          </table:table-cell>
          <table:table-cell table:style-name="表格2.A1" office:value-type="string">
            <text:p text:style-name="Table_20_Heading">含义 (Meaning)</text:p>
          </table:table-cell>
          <table:table-cell table:style-name="表格2.A1" office:value-type="string">
            <text:p text:style-name="Table_20_Heading">内容来源 (Where to get it)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Functional Requirement</text:span></text:p>
          </table:table-cell>
          <table:table-cell table:style-name="表格2.A1" office:value-type="string">
            <text:p text:style-name="Table_20_Contents"><text:span text:style-name="Strong_20_Emphasis">基础需求分类</text:span></text:p>
          </table:table-cell>
          <table:table-cell table:style-name="表格2.A1" office:value-type="string">
            <text:p text:style-name="Table_20_Contents">直接引用标准的 <text:span text:style-name="Strong_20_Emphasis">FR 1 到 FR 7</text:span>（如：System Integrity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ID</text:span></text:p>
          </table:table-cell>
          <table:table-cell table:style-name="表格2.A1" office:value-type="string">
            <text:p text:style-name="Table_20_Contents"><text:span text:style-name="Strong_20_Emphasis">具体需求编号</text:span></text:p>
          </table:table-cell>
          <table:table-cell table:style-name="表格2.A1" office:value-type="string">
            <text:p text:style-name="Table_20_Contents">直接引用标准中的 <text:span text:style-name="Strong_20_Emphasis">CR</text:span> 或 <text:span text:style-name="Strong_20_Emphasis">RE</text:span> 编号（如：CR 3.3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Name</text:span></text:p>
          </table:table-cell>
          <table:table-cell table:style-name="表格2.A1" office:value-type="string">
            <text:p text:style-name="Table_20_Contents"><text:span text:style-name="Strong_20_Emphasis">需求名称</text:span></text:p>
          </table:table-cell>
          <table:table-cell table:style-name="表格2.A1" office:value-type="string">
            <text:p text:style-name="Table_20_Contents">标准中对应的标题（如：Boot integrity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Requirement</text:span></text:p>
          </table:table-cell>
          <table:table-cell table:style-name="表格2.A1" office:value-type="string">
            <text:p text:style-name="Table_20_Contents"><text:span text:style-name="Strong_20_Emphasis">需求原文描述</text:span></text:p>
          </table:table-cell>
          <table:table-cell table:style-name="表格2.A1" office:value-type="string">
            <text:p text:style-name="Table_20_Contents">从 <text:span text:style-name="Strong_20_Emphasis">IEC 62443-4-2 标准文本</text:span>中直接复制该 ID 对应的定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SL (Security Level)</text:span></text:p>
          </table:table-cell>
          <table:table-cell table:style-name="表格2.A1" office:value-type="string">
            <text:p text:style-name="Table_20_Contents"><text:span text:style-name="Strong_20_Emphasis">安全等级目标</text:span></text:p>
          </table:table-cell>
          <table:table-cell table:style-name="表格2.A1" office:value-type="string">
            <text:p text:style-name="Table_20_Contents">填写你们产品申请的等级（如：<text:span text:style-name="Strong_20_Emphasis">SL 2</text:span>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Conformity Statement</text:span></text:p>
          </table:table-cell>
          <table:table-cell table:style-name="表格2.A1" office:value-type="string">
            <text:p text:style-name="Table_20_Contents"><text:span text:style-name="Strong_20_Emphasis">合规性声明</text:span></text:p>
          </table:table-cell>
          <table:table-cell table:style-name="表格2.A1" office:value-type="string">
            <text:p text:style-name="Table_20_Contents"><text:span text:style-name="Strong_20_Emphasis">由你填写</text:span>：简述你的软件/固件是如何满足这项要求的（例如：“系统通过 RK3568 eFuse 校验 U-Boot 签名实现”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Conformity Evidence</text:span></text:p>
          </table:table-cell>
          <table:table-cell table:style-name="表格2.A1" office:value-type="string">
            <text:p text:style-name="Table_20_Contents"><text:span text:style-name="Strong_20_Emphasis">合规性证据</text:span></text:p>
          </table:table-cell>
          <table:table-cell table:style-name="表格2.A1" office:value-type="string">
            <text:p text:style-name="P12"><text:span text:style-name="Strong_20_Emphasis">最重要</text:span>：列出具体的<text:span text:style-name="Strong_20_Emphasis">文件名、函数名、配置路径或文档编号</text:span>（如：<text:span text:style-name="Source_20_Text">u-boot/configs/rk3568_defconfig</text:span> 第 45 行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Result-Remarks</text:span></text:p>
          </table:table-cell>
          <table:table-cell table:style-name="表格2.A1" office:value-type="string">
            <text:p text:style-name="Table_20_Contents"><text:span text:style-name="Strong_20_Emphasis">结果备注</text:span></text:p>
          </table:table-cell>
          <table:table-cell table:style-name="表格2.A1" office:value-type="string">
            <text:p text:style-name="Table_20_Contents">填写测试时的观察，或说明某些特殊情况（如：该项不适用，因<text:soft-page-break/>为产品无无线功能）。</text:p>
          </table:table-cell>
        </table:table-row>
        <table:table-row>
          <table:table-cell table:style-name="表格2.A1" office:value-type="string">
            <text:p text:style-name="Table_20_Contents"><text:span text:style-name="Strong_20_Emphasis">Verdict</text:span></text:p>
          </table:table-cell>
          <table:table-cell table:style-name="表格2.A1" office:value-type="string">
            <text:p text:style-name="Table_20_Contents"><text:span text:style-name="Strong_20_Emphasis">结论判定</text:span></text:p>
          </table:table-cell>
          <table:table-cell table:style-name="表格2.A1" office:value-type="string">
            <text:p text:style-name="Table_20_Contents">通常填 <text:span text:style-name="Strong_20_Emphasis">Pass</text:span>（通过）、<text:span text:style-name="Strong_20_Emphasis">Fail</text:span>（失败）或 <text:span text:style-name="Strong_20_Emphasis">N/A</text:span>（不适用）。</text:p>
          </table:table-cell>
        </table:table-row>
      </table:table>
      <text:p text:style-name="Horizontal_20_Line"/>
      <text:p text:style-name="P2">2. 填写内容从哪里来？</text:p>
      <text:p text:style-name="Text_20_body">作为研发，你的核心任务是完成 <text:span text:style-name="Strong_20_Emphasis">Conformity Statement（怎么做的）</text:span> 和 <text:span text:style-name="Strong_20_Emphasis">Conformity Evidence（证据在哪）</text:span>：</text:p>
      <text:list xml:id="list942634774" text:style-name="L27">
        <text:list-item>
          <text:p text:style-name="P68"><text:span text:style-name="Strong_20_Emphasis">标准定义部分（ID, Name, Requirement）</text:span>：<text:line-break/>这些是“死内容”，直接从 <text:span text:style-name="Strong_20_Emphasis">IEC 62443-4-2 官方标准文档</text:span>或认证机构提供的模板中拷贝。</text:p>
        </text:list-item>
        <text:list-item>
          <text:p text:style-name="P68"><text:span text:style-name="Strong_20_Emphasis">合规声明部分（Conformity Statement）</text:span>：<text:line-break/>来自你的 <text:span text:style-name="Strong_20_Emphasis">《系统架构设计说明书 (SDS)》</text:span>。你需要用技术语言概括你的实现方案。</text:p>
          <text:list>
            <text:list-item>
              <text:p text:style-name="P68"><text:span text:style-name="Emphasis">示例</text:span>：针对 CR 3.3，你会写：“利用 RK3568 硬件 Root of Trust，在启动时强制校验签名。”</text:p>
            </text:list-item>
          </text:list>
        </text:list-item>
        <text:list-item>
          <text:p text:style-name="P68"><text:span text:style-name="Strong_20_Emphasis">合规证据部分（Conformity Evidence）</text:span>：<text:line-break/>来自你的 <text:span text:style-name="Strong_20_Emphasis">代码库 (Git/SVN)</text:span> 和 <text:span text:style-name="Strong_20_Emphasis">测试报告</text:span>。</text:p>
          <text:list>
            <text:list-item>
              <text:p text:style-name="P69"><text:span text:style-name="Emphasis">示例</text:span>：列出 <text:span text:style-name="Source_20_Text">build.sh</text:span> 脚本路径、eFuse 烧录日志、或者《安全测试报告》第 3.2 章节。</text:p>
            </text:list-item>
          </text:list>
        </text:list-item>
      </text:list>
      <text:p text:style-name="Horizontal_20_Line"/>
      <text:p text:style-name="P2">3. 研发人员填写的具体例子（以 RK3568 为例）</text:p>
      <text:p text:style-name="Text_20_body">假设你在填 <text:span text:style-name="Strong_20_Emphasis">CR 3.3 (Boot Integrity)</text:span> 这一行：</text:p>
      <text:list xml:id="list466032696" text:style-name="L28">
        <text:list-item>
          <text:p text:style-name="P70"><text:span text:style-name="Strong_20_Emphasis">ID</text:span>: CR 3.3</text:p>
        </text:list-item>
        <text:list-item>
          <text:p text:style-name="P70"><text:span text:style-name="Strong_20_Emphasis">Name</text:span>: Boot integrity</text:p>
        </text:list-item>
        <text:list-item>
          <text:p text:style-name="P70"><text:span text:style-name="Strong_20_Emphasis">SL</text:span>: 2</text:p>
        </text:list-item>
        <text:list-item>
          <text:p text:style-name="P70"><text:span text:style-name="Strong_20_Emphasis">Conformity Statement</text:span>: 固件采用 RSA-2048 签名，由 RK3568 MaskROM 启动时校验。若校验失败，系统拒绝进入 Debian。</text:p>
        </text:list-item>
        <text:list-item>
          <text:p text:style-name="P70"><text:span text:style-name="Strong_20_Emphasis">Conformity Evidence</text:span>:</text:p>
          <text:list>
            <text:list-item>
              <text:p text:style-name="P71">源代码：<text:span text:style-name="Source_20_Text">u-boot/common/spl/spl_fit.c</text:span>；</text:p>
            </text:list-item>
            <text:list-item>
              <text:p text:style-name="P71">配置文件：<text:span text:style-name="Source_20_Text">rk3568_sec_defconfig</text:span>；</text:p>
            </text:list-item>
            <text:list-item>
              <text:p text:style-name="P70">测试证据：查看《启动安全测试报告》中的“篡改固件启动失败截图”。</text:p>
            </text:list-item>
          </text:list>
        </text:list-item>
        <text:list-item>
          <text:p text:style-name="P72"><text:span text:style-name="Strong_20_Emphasis">Verdict</text:span>: Pass</text:p>
        </text:list-item>
      </text:list>
      <text:p text:style-name="Horizontal_20_Line"/>
      <text:p text:style-name="Text_20_body">4. 特别建议</text:p>
      <text:list xml:id="list1177689875" text:style-name="L29">
        <text:list-item>
          <text:p text:style-name="P73"><text:span text:style-name="Strong_20_Emphasis">证据要“硬”</text:span>：不要只写“我们做了加密”，要写出“使用了 OpenSSL v3.0.x，调用了 RK3568 加密引擎驱动”。</text:p>
        </text:list-item>
        <text:list-item>
          <text:p text:style-name="P73"><text:span text:style-name="Strong_20_Emphasis">关联 4-1</text:span>：如果某些项是流程相关的，证据可以指向你的 <text:span text:style-name="Strong_20_Emphasis">4-1 流程文档</text:span>（如：代码审查记录）。</text:p>
        </text:list-item>
        <text:list-item>
          <text:p text:style-name="P74"><text:span text:style-name="Strong_20_Emphasis">结果备注</text:span>：如果某些 CR 无法在样机上演示（例如：物理防拆），备注里要注明你的“补偿性措施”。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这三个附件是 </text:p>
      <text:p text:style-name="Standard"><text:span text:style-name="Strong_20_Emphasis">IEC 62443 认证申请包</text:span>中的核心组件，它们共同构成了一套完整的“证据链”，用来向认证机构（如 ISASecure、TÜV 等）证明你的 <text:span text:style-name="Strong_20_Emphasis">RK3568 平台</text:span>符合安全标准。</text:p>
      <text:p text:style-name="Standard">作为研发人员，你可以这样理解它们的作用：</text:p>
      <text:p text:style-name="Horizontal_20_Line"/>
      <text:p text:style-name="P2"><text:span text:style-name="Strong_20_Emphasis">ATTACHMENT 1：Compliance Checklist（合规性检查表）</text:span></text:p>
      <text:p text:style-name="Text_20_body">这是你<text:span text:style-name="Strong_20_Emphasis">填写工作量最大</text:span>的表格，也是审计员最关心的文件。</text:p>
      <text:list xml:id="list3383583680" text:style-name="L30">
        <text:list-item>
          <text:p text:style-name="P75"><text:span text:style-name="Strong_20_Emphasis">它是啥</text:span>：一份包含所有 <text:span text:style-name="Strong_20_Emphasis">CR（组件要求）</text:span> 和 <text:span text:style-name="Strong_20_Emphasis">RE（强化要求）</text:span> 的详尽清单（就是你上一问中提到的包含 ID、Name、Requirement 等列的表格）。</text:p>
        </text:list-item>
        <text:list-item>
          <text:p text:style-name="P75"><text:span text:style-name="Strong_20_Emphasis">研发要做什么</text:span>：</text:p>
          <text:list>
            <text:list-item>
              <text:p text:style-name="P75">针对每一条安全要求（如 CR 3.3 安全启动），填写你的产品是<text:span text:style-name="Strong_20_Emphasis">如何实现</text:span>的（Conformity Statement）。</text:p>
            </text:list-item>
            <text:list-item>
              <text:p text:style-name="P75">将每一条要求指向具体的证据编号（链接到 Attachment 3）。</text:p>
            </text:list-item>
          </text:list>
        </text:list-item>
        <text:list-item>
          <text:p text:style-name="P76"><text:span text:style-name="Strong_20_Emphasis">核心目的</text:span>：逐条对应标准，声明你的产品“<text:span text:style-name="Strong_20_Emphasis">做到了</text:span>”。</text:p>
        </text:list-item>
      </text:list>
      <text:p text:style-name="Horizontal_20_Line"/>
      <text:p text:style-name="P2"><text:span text:style-name="Strong_20_Emphasis">ATTACHMENT 2：Maturity Levels and Verdicts Summary（成熟度等级与判定摘要）</text:span></text:p>
      <text:p text:style-name="Text_20_body">这通常是一份<text:span text:style-name="Strong_20_Emphasis">总结性图表</text:span>，用于量化评估。</text:p>
      <text:list xml:id="list1505138988" text:style-name="L31">
        <text:list-item>
          <text:p text:style-name="P77"><text:span text:style-name="Strong_20_Emphasis">它是啥</text:span>：</text:p>
          <text:list>
            <text:list-item>
              <text:p text:style-name="P77"><text:span text:style-name="Strong_20_Emphasis">Maturity Levels（成熟度）</text:span>：主要针对 <text:span text:style-name="Strong_20_Emphasis">4-1 流程</text:span>。分为 Level 1（初步）到 Level 4（优化）。它评估的是你们的开发流程是否稳定、可重复。</text:p>
            </text:list-item>
            <text:list-item>
              <text:p text:style-name="P77"><text:span text:style-name="Strong_20_Emphasis">Verdicts Summary（判定摘要）</text:span>：汇总所有 CR 的统计结果。例如：FR 1 通过了 10 项，N/A 2 项，失败 0 项。</text:p>
            </text:list-item>
          </text:list>
        </text:list-item>
        <text:list-item>
          <text:p text:style-name="P77"><text:span text:style-name="Strong_20_Emphasis">研发要做什么</text:span>：通常由<text:span text:style-name="Strong_20_Emphasis">质量负责人 (QA) 或项目负责人</text:span>根据 Attachment 1 的结果进行汇总填充。</text:p>
        </text:list-item>
        <text:list-item>
          <text:p text:style-name="P78"><text:span text:style-name="Strong_20_Emphasis">核心目的</text:span>：给审计员一个“<text:span text:style-name="Strong_20_Emphasis">总览</text:span>”，一眼看出产品的安全成熟度和整体通过率。</text:p>
        </text:list-item>
      </text:list>
      <text:p text:style-name="Horizontal_20_Line"/>
      <text:p text:style-name="P2"><text:span text:style-name="Strong_20_Emphasis">ATTACHMENT 3：Evidences List（证据清单）</text:span></text:p>
      <text:p text:style-name="Text_20_body">这是所有证明材料的<text:span text:style-name="Strong_20_Emphasis">索引库</text:span>。</text:p>
      <text:list xml:id="list3208904064" text:style-name="L32">
        <text:list-item>
          <text:p text:style-name="P79"><text:span text:style-name="Strong_20_Emphasis">它是啥</text:span>：一份编号列表，列出了所有支持你“合规声明”的原始文件。</text:p>
        </text:list-item>
        <text:list-item>
          <text:p text:style-name="P79"><text:span text:style-name="Strong_20_Emphasis">研发要做什么</text:span>：你需要收集并编号以下文件：</text:p>
          <text:list>
            <text:list-item>
              <text:p text:style-name="P80"><text:span text:style-name="Strong_20_Emphasis">代码/配置类</text:span>：<text:span text:style-name="Source_20_Text">rk3568_defconfig</text:span> 截图、<text:span text:style-name="Source_20_Text">build_secure.sh</text:span> 脚本。</text:p>
            </text:list-item>
            <text:list-item>
              <text:p text:style-name="P79"><text:span text:style-name="Strong_20_Emphasis">文档类</text:span>：RK3568 威胁建模报告、安全架构设计书。</text:p>
            </text:list-item>
            <text:list-item>
              <text:p text:style-name="P79"><text:span text:style-name="Strong_20_Emphasis">日志/截图类</text:span>：Secure Boot 校验失败的串口打印日志、CVE 扫描报告。</text:p>
            </text:list-item>
          </text:list>
        </text:list-item>
        <text:list-item>
          <text:p text:style-name="P81"><text:span text:style-name="Strong_20_Emphasis">核心目的</text:span>：审计员在看 Attachment 1 时，如果怀疑某项实现，会根据编号直接来这里找<text:span text:style-name="Strong_20_Emphasis">原始证据</text:span>。</text:p>
        </text:list-item>
      </text:list>
      <text:p text:style-name="Horizontal_20_Line"/>
      <text:p text:style-name="Text_20_body"><text:span text:style-name="Strong_20_Emphasis">三者的逻辑关系：</text:span></text:p>
      <text:list xml:id="list2056313433" text:style-name="L33">
        <text:list-item>
          <text:p text:style-name="P82">你先收集证据（代码、报告），编好号放入 <text:span text:style-name="Strong_20_Emphasis">Attachment 3</text:span>。</text:p>
        </text:list-item>
        <text:list-item>
          <text:p text:style-name="P82">你在 <text:span text:style-name="Strong_20_Emphasis">Attachment 1</text:span> 里写：“针对安全启动，我们配置了 XXX 宏（见证据编号 05）”。</text:p>
        </text:list-item>
        <text:list-item>
          <text:p text:style-name="P83"><text:soft-page-break/>最后在 <text:span text:style-name="Strong_20_Emphasis">Attachment 2</text:span> 里总结：“FR 3 系统完整性全部达标，流程成熟度为 Level 3”。</text:p>
        </text:list-item>
      </text:list>
      <text:p text:style-name="P2"><text:span text:style-name="Strong_20_Emphasis">💡 研发实操建议：</text:span><text:line-break/>由于你是负责软件/固件的，建议你先从 <text:span text:style-name="Strong_20_Emphasis">Attachment 3</text:span> 的证据收集开始。对于 <text:span text:style-name="Strong_20_Emphasis">RK3568</text:span>，最重要的证据通常是：<text:span text:style-name="Strong_20_Emphasis">eFuse 烧录记录</text:span>、<text:span text:style-name="Strong_20_Emphasis">U-Boot 签名源码</text:span>、<text:span text:style-name="Strong_20_Emphasis">Debian 防火墙脚本</text:span>以及 <text:span text:style-name="Strong_20_Emphasis">SBOM 导出文件</text:span>。</text:p>
      <text:p text:style-name="Standard"/>
      <text:p text:style-name="Standard"/>
      <text:p text:style-name="Standard">为了方便你直接开始整理 </text:p>
      <text:p text:style-name="Standard"><text:span text:style-name="Strong_20_Emphasis">RK3568 + Debian</text:span> 平台的认证资料，我为你设计了一个符合工业审计习惯的 <text:span text:style-name="Strong_20_Emphasis">Attachment 3（证据清单）</text:span> 参考范例。</text:p>
      <text:p text:style-name="Standard">这个清单的逻辑是：<text:span text:style-name="Strong_20_Emphasis">编号 + 证据名称 + 证据类型 + 对应 CR 编号</text:span>。</text:p>
      <text:p text:style-name="Horizontal_20_Line"/>
      <text:p text:style-name="P2"><text:span text:style-name="Strong_20_Emphasis">ATTACHMENT 3: Evidences List (参考范例)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>
          <table:table-cell table:style-name="表格4.A1" office:value-type="string">
            <text:p text:style-name="Table_20_Heading">证据编号</text:p>
          </table:table-cell>
          <table:table-cell table:style-name="表格4.A1" office:value-type="string">
            <text:p text:style-name="Table_20_Heading">证据名称 (Evidence Name)</text:p>
          </table:table-cell>
          <table:table-cell table:style-name="表格4.A1" office:value-type="string">
            <text:p text:style-name="Table_20_Heading">证据类型</text:p>
          </table:table-cell>
          <table:table-cell table:style-name="表格4.A1" office:value-type="string">
            <text:p text:style-name="Table_20_Heading">覆盖的 CR 编号 (Mapping)</text:p>
          </table:table-cell>
          <table:table-cell table:style-name="表格4.A1" office:value-type="string">
            <text:p text:style-name="Table_20_Heading">说明 (研发备注)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1</text:span></text:p>
          </table:table-cell>
          <table:table-cell table:style-name="表格4.A1" office:value-type="string">
            <text:p text:style-name="Table_20_Contents">RK3568 安全启动架构说明</text:p>
          </table:table-cell>
          <table:table-cell table:style-name="表格4.A1" office:value-type="string">
            <text:p text:style-name="Table_20_Contents">设计文档</text:p>
          </table:table-cell>
          <table:table-cell table:style-name="表格4.A1" office:value-type="string">
            <text:p text:style-name="Table_20_Contents">CR 3.3 (Boot Integrity)</text:p>
          </table:table-cell>
          <table:table-cell table:style-name="表格4.A1" office:value-type="string">
            <text:p text:style-name="Table_20_Contents">描述 MaskROM 到 Kernel 的签名链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2</text:span></text:p>
          </table:table-cell>
          <table:table-cell table:style-name="表格4.A1" office:value-type="string">
            <text:p text:style-name="P12"><text:span text:style-name="Source_20_Text">rk3568_sec_defconfig</text:span></text:p>
          </table:table-cell>
          <table:table-cell table:style-name="表格4.A1" office:value-type="string">
            <text:p text:style-name="Table_20_Contents">源代码配置</text:p>
          </table:table-cell>
          <table:table-cell table:style-name="表格4.A1" office:value-type="string">
            <text:p text:style-name="Table_20_Contents">CR 3.3, CR 4.1</text:p>
          </table:table-cell>
          <table:table-cell table:style-name="表格4.A1" office:value-type="string">
            <text:p text:style-name="P12">开启了 <text:span text:style-name="Source_20_Text">CONFIG_FIT_SIGNATURE</text:span> 和加密引擎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3</text:span></text:p>
          </table:table-cell>
          <table:table-cell table:style-name="表格4.A1" office:value-type="string">
            <text:p text:style-name="P12">固件签名脚本 <text:span text:style-name="Source_20_Text">sign_image.sh</text:span></text:p>
          </table:table-cell>
          <table:table-cell table:style-name="表格4.A1" office:value-type="string">
            <text:p text:style-name="Table_20_Contents">自动化脚本</text:p>
          </table:table-cell>
          <table:table-cell table:style-name="表格4.A1" office:value-type="string">
            <text:p text:style-name="Table_20_Contents">CR 3.4 (Firmware Update)</text:p>
          </table:table-cell>
          <table:table-cell table:style-name="表格4.A1" office:value-type="string">
            <text:p text:style-name="P12">调用 <text:span text:style-name="Source_20_Text">rk_sign_tool</text:span> 进行 RSA 签名的过程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4</text:span></text:p>
          </table:table-cell>
          <table:table-cell table:style-name="表格4.A1" office:value-type="string">
            <text:p text:style-name="Table_20_Contents">eFuse 烧录成功日志</text:p>
          </table:table-cell>
          <table:table-cell table:style-name="表格4.A1" office:value-type="string">
            <text:p text:style-name="Table_20_Contents">运行日志</text:p>
          </table:table-cell>
          <table:table-cell table:style-name="表格4.A1" office:value-type="string">
            <text:p text:style-name="Table_20_Contents">CR 3.3 (RE 1)</text:p>
          </table:table-cell>
          <table:table-cell table:style-name="表格4.A1" office:value-type="string">
            <text:p text:style-name="Table_20_Contents">证明公钥哈希已锁定在硬件 eFuse 中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5</text:span></text:p>
          </table:table-cell>
          <table:table-cell table:style-name="表格4.A1" office:value-type="string">
            <text:p text:style-name="Table_20_Contents">Debian 系统加固配置脚本</text:p>
          </table:table-cell>
          <table:table-cell table:style-name="表格4.A1" office:value-type="string">
            <text:p text:style-name="Table_20_Contents">脚本文件</text:p>
          </table:table-cell>
          <table:table-cell table:style-name="表格4.A1" office:value-type="string">
            <text:p text:style-name="Table_20_Contents">CR 1.1, CR 1.8, CR 5.3</text:p>
          </table:table-cell>
          <table:table-cell table:style-name="表格4.A1" office:value-type="string">
            <text:p text:style-name="Table_20_Contents">包含禁用 root、设置密码复杂度、关闭端口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6</text:span></text:p>
          </table:table-cell>
          <table:table-cell table:style-name="表格4.A1" office:value-type="string">
            <text:p text:style-name="P12"><text:span text:style-name="Source_20_Text">/etc/audit/audit.rules</text:span></text:p>
          </table:table-cell>
          <table:table-cell table:style-name="表格4.A1" office:value-type="string">
            <text:p text:style-name="Table_20_Contents">配置文件</text:p>
          </table:table-cell>
          <table:table-cell table:style-name="表格4.A1" office:value-type="string">
            <text:p text:style-name="Table_20_Contents">CR 2.8, CR 2.9</text:p>
          </table:table-cell>
          <table:table-cell table:style-name="表格4.A1" office:value-type="string">
            <text:p text:style-name="Table_20_Contents">定义了哪些系统调用会被记录到审计日志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7</text:span></text:p>
          </table:table-cell>
          <table:table-cell table:style-name="表格4.A1" office:value-type="string">
            <text:p text:style-name="Table_20_Contents">软件物料清单 (SBOM.csv)</text:p>
          </table:table-cell>
          <table:table-cell table:style-name="表格4.A1" office:value-type="string">
            <text:p text:style-name="Table_20_Contents">自动生成</text:p>
          </table:table-cell>
          <table:table-cell table:style-name="表格4.A1" office:value-type="string">
            <text:p text:style-name="Table_20_Contents">CR 3.10 (SBOM)</text:p>
          </table:table-cell>
          <table:table-cell table:style-name="表格4.A1" office:value-type="string">
            <text:p text:style-name="P12">使用 <text:span text:style-name="Source_20_Text">dpkg</text:span> 导出的所有 Debian 软件包清单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8</text:span></text:p>
          </table:table-cell>
          <table:table-cell table:style-name="表格4.A1" office:value-type="string">
            <text:p text:style-name="Table_20_Contents">脆弱性扫描报告 (Trivy/Nessus)</text:p>
          </table:table-cell>
          <table:table-cell table:style-name="表格4.A1" office:value-type="string">
            <text:p text:style-name="Table_20_Contents">测试报告</text:p>
          </table:table-cell>
          <table:table-cell table:style-name="表格4.A1" office:value-type="string">
            <text:p text:style-name="Table_20_Contents">CR 3.11 (Vulnerability)</text:p>
          </table:table-cell>
          <table:table-cell table:style-name="表格4.A1" office:value-type="string">
            <text:p text:style-name="Table_20_Contents">证明系统已知漏洞已修复或受控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09</text:span></text:p>
          </table:table-cell>
          <table:table-cell table:style-name="表格4.A1" office:value-type="string">
            <text:p text:style-name="Table_20_Contents">串口 Shell 锁定截图</text:p>
          </table:table-cell>
          <table:table-cell table:style-name="表格4.A1" office:value-type="string">
            <text:p text:style-name="Table_20_Contents">运行截图</text:p>
          </table:table-cell>
          <table:table-cell table:style-name="表格4.A1" office:value-type="string">
            <text:p text:style-name="Table_20_Contents">CR 1.1, CR 5.3</text:p>
          </table:table-cell>
          <table:table-cell table:style-name="表格4.A1" office:value-type="string">
            <text:p text:style-name="Table_20_Contents">证明物理串口无法在未授权情况下进入控制台。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EV-10</text:span></text:p>
          </table:table-cell>
          <table:table-cell table:style-name="表格4.A1" office:value-type="string">
            <text:p text:style-name="Table_20_Contents">异常引导失败测试录像/截图</text:p>
          </table:table-cell>
          <table:table-cell table:style-name="表格4.A1" office:value-type="string">
            <text:p text:style-name="Table_20_Contents">测试证据</text:p>
          </table:table-cell>
          <table:table-cell table:style-name="表格4.A1" office:value-type="string">
            <text:p text:style-name="Table_20_Contents">CR 3.6, CR 3.7</text:p>
          </table:table-cell>
          <table:table-cell table:style-name="表格4.A1" office:value-type="string">
            <text:p text:style-name="Table_20_Contents">篡改内核后，RK3568 拒绝启动的真实记录。</text:p>
          </table:table-cell>
        </table:table-row>
      </table:table>
      <text:p text:style-name="Horizontal_20_Line"/>
      <text:p text:style-name="P2"><text:span text:style-name="Strong_20_Emphasis">研发人员如何“引用”这些证据？</text:span></text:p>
      <text:p text:style-name="Text_20_body">当你填写 <text:span text:style-name="Strong_20_Emphasis">Attachment 1 (Compliance Checklist)</text:span> 的 <text:span text:style-name="Strong_20_Emphasis">Conformity Evidence</text:span> 列时，你就直接引用上面的编号：</text:p>
      <text:list xml:id="list3682339185" text:style-name="L37">
        <text:list-item>
          <text:p text:style-name="P92"><text:span text:style-name="Strong_20_Emphasis">例子 (针对 CR 3.3 - 启动完整性)</text:span>：</text:p>
          <text:list>
            <text:list-item>
              <text:p text:style-name="P92"><text:span text:style-name="Emphasis">Conformity Statement</text:span>: "本产品通过 RK3568 硬件安全引导实现。MaskROM 校验 SPL 签名，SPL 校验 U-Boot 签名。"</text:p>
            </text:list-item>
            <text:list-item>
              <text:p text:style-name="P93"><text:soft-page-break/><text:span text:style-name="Emphasis">Conformity Evidence</text:span>: "<text:span text:style-name="Strong_20_Emphasis">See EV-01 (Architecture), EV-02 (Config), EV-10 (Failure Test Case).</text:span>"</text:p>
            </text:list-item>
          </text:list>
        </text:list-item>
      </text:list>
      <text:p text:style-name="Horizontal_20_Line"/>
      <text:p text:style-name="Text_20_body"><text:span text:style-name="Strong_20_Emphasis">给你的 3 点细节建议：</text:span></text:p>
      <text:list xml:id="list2330172647" text:style-name="L38">
        <text:list-item>
          <text:p text:style-name="P95"><text:span text:style-name="Strong_20_Emphasis">证据颗粒度</text:span>：审计员喜欢看“截图 + 路径”。比如针对 <text:span text:style-name="Strong_20_Emphasis">CR 1.8（密码策略）</text:span>，不要只说配了，要给出一张 <text:span text:style-name="Source_20_Text">/etc/pam.d/common-password</text:span> 的<text:span text:style-name="Strong_20_Emphasis">文件内容截图</text:span>。</text:p>
        </text:list-item>
        <text:list-item>
          <text:p text:style-name="P94"><text:span text:style-name="Strong_20_Emphasis">版本一致性</text:span>：确保 <text:span text:style-name="Strong_20_Emphasis">EV-07 (SBOM)</text:span> 里的软件版本，和你测试报告中记录的固件版本（如 V1.0.2）完全一致。</text:p>
        </text:list-item>
        <text:list-item>
          <text:p text:style-name="P96"><text:span text:style-name="Strong_20_Emphasis">负面测试证据</text:span>：4-2 认证非常看重“功能失效时的反应”。一定要准备一份证据（如 <text:span text:style-name="Strong_20_Emphasis">EV-10</text:span>），证明当你尝试用非法固件启动时，RK3568 确实<text:span text:style-name="Strong_20_Emphasis">锁死了</text:span>。</text:p>
        </text:list-item>
      </text:list>
      <text:p text:style-name="Standard"/>
      <text:p text:style-name="Standard"/>
      <text:p text:style-name="Standard"/>
      <text:p text:style-name="Standard">这三个标题实际上是你为了通过 </text:p>
      <text:p text:style-name="Standard"><text:span text:style-name="Strong_20_Emphasis">IEC 62443-4-2</text:span> 认证，针对 <text:span text:style-name="Strong_20_Emphasis">Ubuntu 22.04</text:span>（在你的 RK3568 平台上运行）所准备的<text:span text:style-name="Strong_20_Emphasis">合规性论证文件</text:span>。</text:p>
      <text:p text:style-name="Standard">它们的关系是：<text:span text:style-name="Strong_20_Emphasis">总纲 + 专项技术实现 + 专项流程指导</text:span>。以下是深度解析：</text:p>
      <text:p text:style-name="Horizontal_20_Line"/>
      <text:p text:style-name="Text_20_body">1. 第一个文档：STATEMENTS AND CONFORMITY EVIDENCES FOR SECURITY CAPABILITY REQUIREMENTS</text:p>
      <text:list xml:id="list2777471629" text:style-name="L34">
        <text:list-item>
          <text:p text:style-name="P84"><text:span text:style-name="Strong_20_Emphasis">它是啥</text:span>：这是你的<text:span text:style-name="Strong_20_Emphasis">总表（Master Table）</text:span>。</text:p>
        </text:list-item>
        <text:list-item>
          <text:p text:style-name="P84"><text:span text:style-name="Strong_20_Emphasis">如何理解</text:span>：它是一个导航文档，将 4-2 标准中所有的 CR（如 CR 1.1 到 CR 7.7）汇总在一起。</text:p>
        </text:list-item>
        <text:list-item>
          <text:p text:style-name="P84"><text:span text:style-name="Strong_20_Emphasis">填写核心</text:span>：</text:p>
          <text:list>
            <text:list-item>
              <text:p text:style-name="P84"><text:span text:style-name="Strong_20_Emphasis">声明 (Statement)</text:span>：简述“我们满足了这一项”。</text:p>
            </text:list-item>
            <text:list-item>
              <text:p text:style-name="P84"><text:span text:style-name="Strong_20_Emphasis">证据指针 (Evidence Pointer)</text:span>：告诉审计员，具体的代码实现、配置文件或测试截图在哪个附件里。</text:p>
            </text:list-item>
          </text:list>
        </text:list-item>
        <text:list-item>
          <text:p text:style-name="P85"><text:span text:style-name="Strong_20_Emphasis">对研发的意义</text:span>：这是你的“<text:span text:style-name="Strong_20_Emphasis">目录索引</text:span>”，确保没有遗漏任何一项标准要求。</text:p>
        </text:list-item>
      </text:list>
      <text:p text:style-name="Horizontal_20_Line"/>
      <text:p text:style-name="Text_20_body">2. 第二个文档：CR 4.3 USE OF CRYPTOGRAPHY: COMPREHENSIVE USE OF CRYPTOGRAPHY IN UBUNTU 22.04</text:p>
      <text:list xml:id="list704638761" text:style-name="L35">
        <text:list-item>
          <text:p text:style-name="P86"><text:span text:style-name="Strong_20_Emphasis">它是啥</text:span>：这是针对 <text:span text:style-name="Strong_20_Emphasis">数据机密性 (FR 4)</text:span> 的<text:span text:style-name="Strong_20_Emphasis">技术实现专项文档</text:span>。</text:p>
        </text:list-item>
        <text:list-item>
          <text:p text:style-name="P86"><text:span text:style-name="Strong_20_Emphasis">如何理解</text:span>：审计员非常看重加密。Ubuntu 22.04 默认有很多功能，但你需要证明你在 RK3568 上<text:span text:style-name="Strong_20_Emphasis">正确地调用了它们</text:span>。</text:p>
        </text:list-item>
        <text:list-item>
          <text:p text:style-name="P86"><text:span text:style-name="Strong_20_Emphasis">研发需要填写的细节</text:span>：</text:p>
          <text:list>
            <text:list-item>
              <text:p text:style-name="P86"><text:span text:style-name="Strong_20_Emphasis">算法选型</text:span>：声明禁用了弱算法（如 MD5/DES），强制使用 AES-256 和 RSA-3072/4096。</text:p>
            </text:list-item>
            <text:list-item>
              <text:p text:style-name="P86"><text:span text:style-name="Strong_20_Emphasis">硬件加速</text:span>：说明你是如何调用 RK3568 的 <text:span text:style-name="Strong_20_Emphasis">Crypto Engine</text:span> 来进行加密的（提高性能）。</text:p>
            </text:list-item>
            <text:list-item>
              <text:p text:style-name="P87"><text:span text:style-name="Strong_20_Emphasis">应用场景</text:span>：列出哪些数据被加密了（如：<text:span text:style-name="Source_20_Text">/etc/shadow</text:span> 的哈希、TLS 1.3 传输控制信令、存储敏感数据的加密分区 LUKS）。</text:p>
            </text:list-item>
            <text:list-item>
              <text:p text:style-name="P88"><text:span text:style-name="Strong_20_Emphasis">密钥管理</text:span>：说明私钥不是明文存放在 rootfs，而是存放在受保护的区域（如 TEE）。</text:p>
            </text:list-item>
          </text:list>
        </text:list-item>
      </text:list>
      <text:p text:style-name="Horizontal_20_Line"/>
      <text:p text:style-name="Text_20_body"><text:soft-page-break/>3. 第三个文档：CR 4.3 USE OF SECURITY GUIDELINES IN UBUNTU 22.04</text:p>
      <text:list xml:id="list2873618757" text:style-name="L36">
        <text:list-item>
          <text:p text:style-name="P89"><text:span text:style-name="Strong_20_Emphasis">它是啥</text:span>：这是针对 <text:span text:style-name="Strong_20_Emphasis">安全配置与操作 (Guideline)</text:span> 的<text:span text:style-name="Strong_20_Emphasis">管理/配置专项文档</text:span>。</text:p>
        </text:list-item>
        <text:list-item>
          <text:p text:style-name="P89"><text:span text:style-name="Strong_20_Emphasis">如何理解</text:span>：光有加密功能（第二篇）是不够的，你还得证明你有一套“<text:span text:style-name="Strong_20_Emphasis">使用说明书</text:span>”来确保系统始终运行在安全状态下。</text:p>
        </text:list-item>
        <text:list-item>
          <text:p text:style-name="P89"><text:span text:style-name="Strong_20_Emphasis">研发需要填写的细节</text:span>：</text:p>
          <text:list>
            <text:list-item>
              <text:p text:style-name="P90"><text:span text:style-name="Strong_20_Emphasis">系统加固指南 (Hardening Guide)</text:span>：例如，你如何配置 <text:span text:style-name="Source_20_Text">ssh_config</text:span>、如何关闭不必要的端口、如何设置 <text:span text:style-name="Source_20_Text">ufw</text:span> 防火墙。</text:p>
            </text:list-item>
            <text:list-item>
              <text:p text:style-name="P89"><text:span text:style-name="Strong_20_Emphasis">凭据管理规范</text:span>：规定用户必须如何设置密码、证书多久更换一次。</text:p>
            </text:list-item>
            <text:list-item>
              <text:p text:style-name="P90"><text:span text:style-name="Strong_20_Emphasis">更新维护策略</text:span>：说明如何利用 Ubuntu 的 <text:span text:style-name="Source_20_Text">unattended-upgrades</text:span> 或手动流程来修补最新的安全漏洞（CVE）。</text:p>
            </text:list-item>
          </text:list>
        </text:list-item>
        <text:list-item>
          <text:p text:style-name="P91"><text:span text:style-name="Strong_20_Emphasis">核心逻辑</text:span>：证明你的安全性不是靠运气，而是靠一套<text:span text:style-name="Strong_20_Emphasis">标准化的配置流程</text:span>维持的。</text:p>
        </text:list-item>
      </text:list>
      <text:p text:style-name="Horizontal_20_Line"/>
      <text:p text:style-name="P2">总结：研发人员如何准备这三份文档？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档名称</text:p>
          </table:table-cell>
          <table:table-cell table:style-name="表格3.A1" office:value-type="string">
            <text:p text:style-name="Table_20_Heading">研发提供什么证据？</text:p>
          </table:table-cell>
          <table:table-cell table:style-name="表格3.A1" office:value-type="string">
            <text:p text:style-name="Table_20_Heading">对应 RK3568 哪个部件？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总纲文档</text:span></text:p>
          </table:table-cell>
          <table:table-cell table:style-name="表格3.A1" office:value-type="string">
            <text:p text:style-name="Table_20_Contents">提供所有配置文件的<text:span text:style-name="Strong_20_Emphasis">路径列表</text:span>。</text:p>
          </table:table-cell>
          <table:table-cell table:style-name="表格3.A1" office:value-type="string">
            <text:p text:style-name="Table_20_Contents">整个软件栈。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加密实现文档</text:span></text:p>
          </table:table-cell>
          <table:table-cell table:style-name="表格3.A1" office:value-type="string">
            <text:p text:style-name="P12">提供 <text:span text:style-name="Source_20_Text">openssl</text:span> 配置文件、<text:span text:style-name="Source_20_Text">dm-crypt</text:span> 设置、<text:span text:style-name="Strong_20_Emphasis">硬件加速驱动加载日志</text:span>。</text:p>
          </table:table-cell>
          <table:table-cell table:style-name="表格3.A1" office:value-type="string">
            <text:p text:style-name="Table_20_Contents">RK3568 加密引擎 + Ubuntu 加密库。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安全指南文档</text:span></text:p>
          </table:table-cell>
          <table:table-cell table:style-name="表格3.A1" office:value-type="string">
            <text:p text:style-name="Table_20_Contents">提供**《Ubuntu 系统安全加固手册》**、防火墙规则脚本、<text:span text:style-name="Strong_20_Emphasis">补丁更新记录</text:span>。</text:p>
          </table:table-cell>
          <table:table-cell table:style-name="表格3.A1" office:value-type="string">
            <text:p text:style-name="Table_20_Contents">Ubuntu OS 层面配置。</text:p>
          </table:table-cell>
        </table:table-row>
      </table:table>
      <text:p text:style-name="P48"><text:span text:style-name="Strong_20_Emphasis">💡 给你的实操建议：</text:span><text:line-break/>针对 <text:span text:style-name="Strong_20_Emphasis">CR 4.3 (加密使用)</text:span>，审计员一定会问：“<text:span text:style-name="Strong_20_Emphasis">你的随机数种子（Random Seed）是从哪里来的？</text:span>”<text:line-break/>在 RK3568 上，你应该回答：使用的是硬件随机数发生器（<text:span text:style-name="Strong_20_Emphasis">TRNG</text:span>），并在文档中展示内核加载 <text:span text:style-name="Source_20_Text">rk_rng</text:span> 驱动的证据。这才是高水平的合规填写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在 <text:span text:style-name="Strong_20_Emphasis">IEC 62443-4-2</text:span> 认证中，硬件（RK3568）只是提供了一个“保险柜”，而<text:span text:style-name="Strong_20_Emphasis">锁怎么上、钥匙谁拿、监控怎么开</text:span>，全靠软件和固件的实现。以下是研发人员在这些文档中的具体职责分工：</text:p>
      <text:p text:style-name="Standard">1. 研发人员（你）必须独立编写的核心技术文档</text:p>
      <text:p text:style-name="P8">这些文档涉及底层代码、内核配置和加密算法，非研发人员无法代劳：</text:p>
      <text:list xml:id="list3097500323" text:style-name="L39">
        <text:list-item>
          <text:p text:style-name="P98"><text:span text:style-name="Strong_20_Emphasis">COMPREHENSIVE USE OF CRYPTOGRAPHY (加密使用专项)</text:span>：</text:p>
          <text:list>
            <text:list-item>
              <text:p text:style-name="P98"><text:soft-page-break/>你需要写清楚：RK3568 的 <text:span text:style-name="Strong_20_Emphasis">Crypto Engine (CE)</text:span> 驱动是怎么加载的？Ubuntu 22.04 的 <text:span text:style-name="Strong_20_Emphasis">OpenSSL</text:span> 配置文件是怎么改的？<text:span text:style-name="Strong_20_Emphasis">LUKS</text:span> 分区加密的密钥是怎么管理的？</text:p>
            </text:list-item>
          </text:list>
        </text:list-item>
        <text:list-item>
          <text:p text:style-name="P98"><text:span text:style-name="Strong_20_Emphasis">USE OF SECURITY GUIDELINES (安全指南专项)</text:span>：</text:p>
          <text:list>
            <text:list-item>
              <text:p text:style-name="P99">你需要写清楚：<text:span text:style-name="Strong_20_Emphasis">Ubuntu 22.04</text:span> 系统是如何加固的（比如：禁用了哪些不安全服务、<text:span text:style-name="Source_20_Text">iptables</text:span> 防火墙规则、SSH 的强认证配置等）。</text:p>
            </text:list-item>
          </text:list>
        </text:list-item>
        <text:list-item>
          <text:p text:style-name="P98"><text:span text:style-name="Strong_20_Emphasis">STATEMENTS AND CONFORMITY EVIDENCES (合规声明与证据)</text:span>：</text:p>
          <text:list>
            <text:list-item>
              <text:p text:style-name="P97">你需要针对每一条技术要求，用技术语言描述你的代码逻辑。</text:p>
            </text:list-item>
          </text:list>
        </text:list-item>
      </text:list>
      <text:p text:style-name="Text_20_body">2. 研发人员提供素材，管理/品质人员汇总的文件</text:p>
      <text:list xml:id="list1847853914" text:style-name="L40">
        <text:list-item>
          <text:p text:style-name="P100"><text:span text:style-name="Strong_20_Emphasis">ATTACHMENT 1 (Compliance Checklist)</text:span>：</text:p>
          <text:list>
            <text:list-item>
              <text:p text:style-name="P100">虽然表格格式由项目经理或 QA 维护，但里面的<text:span text:style-name="Strong_20_Emphasis">“合规声明”</text:span>和<text:span text:style-name="Strong_20_Emphasis">“证据指向”</text:span>必须由你提供。</text:p>
            </text:list-item>
          </text:list>
        </text:list-item>
        <text:list-item>
          <text:p text:style-name="P100"><text:span text:style-name="Strong_20_Emphasis">ATTACHMENT 3 (Evidences List)</text:span>：</text:p>
          <text:list>
            <text:list-item>
              <text:p text:style-name="P101">你需要从你的开发环境里导出：代码截图、<text:span text:style-name="Source_20_Text">defconfig</text:span> 配置文件、编译脚本、<text:span text:style-name="Strong_20_Emphasis">eFuse 烧录日志</text:span>、漏洞扫描报告等原始素材。</text:p>
            </text:list-item>
          </text:list>
        </text:list-item>
      </text:list>
      <text:p text:style-name="Text_20_body">3. 研发人员在 4-1 流程中产生的记录（审计必看）</text:p>
      <text:list xml:id="list955261778" text:style-name="L41">
        <text:list-item>
          <text:p text:style-name="P102"><text:span text:style-name="Strong_20_Emphasis">代码审查记录 (Code Review)</text:span>：证明你的安全代码经过了同事检查。</text:p>
        </text:list-item>
        <text:list-item>
          <text:p text:style-name="P102"><text:span text:style-name="Strong_20_Emphasis">威胁建模 (Threat Modeling)</text:span>：证明你在写代码前考虑过 RK3568 的攻击面。</text:p>
        </text:list-item>
        <text:list-item>
          <text:p text:style-name="P103"><text:span text:style-name="Strong_20_Emphasis">漏洞处理记录</text:span>：证明如果 Ubuntu 出了漏洞，你有流程去修复它。</text:p>
        </text:list-item>
      </text:list>
      <text:p text:style-name="Horizontal_20_Line"/>
      <text:p text:style-name="P2">给研发人员的实战建议：如何减轻写文档的压力？</text:p>
      <text:p text:style-name="Text_20_body">由于你是负责软件和固件的，认证机构最看重的是<text:span text:style-name="Strong_20_Emphasis">“一致性”</text:span>：</text:p>
      <text:list xml:id="list4228429422" text:style-name="L42">
        <text:list-item>
          <text:p text:style-name="P105"><text:span text:style-name="Strong_20_Emphasis">自动化提取证据</text:span>：写一个简单的 Shell 脚本，一键导出 <text:span text:style-name="Source_20_Text">/proc/config.gz</text:span>、<text:span text:style-name="Source_20_Text">lsmod</text:span>、<text:span text:style-name="Source_20_Text">ufw status</text:span> 和 <text:span text:style-name="Source_20_Text">dpkg -l</text:span> 的内容。这些直接作为 <text:span text:style-name="Strong_20_Emphasis">Attachment 3</text:span> 的证据附件，省去手动截图的麻烦。</text:p>
        </text:list-item>
        <text:list-item>
          <text:p text:style-name="P104"><text:span text:style-name="Strong_20_Emphasis">注释即文档</text:span>：在 RK3568 的关键安全代码（如调用 TEE、验签逻辑）附近写好详细注释，以后写文档时直接复制注释内容即可。</text:p>
        </text:list-item>
        <text:list-item>
          <text:p text:style-name="P106"><text:span text:style-name="Strong_20_Emphasis">利用现成工具</text:span>：比如使用 <text:span text:style-name="Source_20_Text">Trivy</text:span> 扫描 Ubuntu 镜像产生的 JSON/PDF 报告，直接作为 <text:span text:style-name="Strong_20_Emphasis">CR 3.10 (SBOM)</text:span> 和 <text:span text:style-name="Strong_20_Emphasis">CR 3.11 (Vulnerability)</text:span> 的证据。</text:p>
        </text:list-item>
      </text:list>
      <text:p text:style-name="P2"><text:span text:style-name="Strong_20_Emphasis">总结建议：</text:span><text:line-break/>你现在是不是已经在准备 <text:span text:style-name="Strong_20_Emphasis">"USE OF CRYPTOGRAPHY" (加密使用)</text:span> 这份文档了？我可以为您提供一个针对 <text:span text:style-name="Strong_20_Emphasis">RK3568 硬件加速 (CE)</text:span> 调用的<text:span text:style-name="Strong_20_Emphasis">技术描述段落示例</text:span>，你可以直接修改后使用。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09:10:12.437634043</meta:creation-date>
    <meta:generator>LibreOffice/7.3.7.2$Linux_X86_64 LibreOffice_project/30$Build-2</meta:generator>
    <dc:date>2026-03-16T15:17:25.636603989</dc:date>
    <meta:editing-duration>PT5H54M56S</meta:editing-duration>
    <meta:editing-cycles>12</meta:editing-cycles>
    <meta:document-statistic meta:table-count="4" meta:image-count="0" meta:object-count="0" meta:page-count="10" meta:paragraph-count="307" meta:word-count="6568" meta:character-count="11239" meta:non-whitespace-character-count="10278"/>
  </office:meta>
</office:document-meta>
</file>